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f8cc" officeooo:paragraph-rsid="0016f8cc"/>
    </style:style>
    <style:style style:name="P2" style:family="paragraph" style:parent-style-name="Quotations">
      <style:text-properties fo:font-style="italic" style:font-style-asian="italic" style:font-style-complex="italic"/>
    </style:style>
    <style:style style:name="P3" style:family="paragraph" style:parent-style-name="Standard">
      <style:text-properties officeooo:rsid="0016f8cc" officeooo:paragraph-rsid="0016f8cc"/>
    </style:style>
    <style:style style:name="P4" style:family="paragraph" style:parent-style-name="Standard">
      <style:text-properties officeooo:paragraph-rsid="0016f8cc"/>
    </style:style>
    <style:style style:name="P5" style:family="paragraph" style:parent-style-name="Quotations" style:list-style-name="L1">
      <style:paragraph-properties fo:margin-top="0cm" fo:margin-bottom="0cm" style:contextual-spacing="false" fo:line-height="0.499cm"/>
      <style:text-properties officeooo:paragraph-rsid="00182bef"/>
    </style:style>
    <style:style style:name="P6" style:family="paragraph" style:parent-style-name="Quotations" style:list-style-name="L1">
      <style:paragraph-properties fo:margin-top="0cm" fo:margin-bottom="0cm" style:contextual-spacing="false" fo:line-height="0.499cm"/>
    </style:style>
    <style:style style:name="P7" style:family="paragraph" style:parent-style-name="Quotations">
      <style:paragraph-properties fo:margin-top="0cm" fo:margin-bottom="0cm" style:contextual-spacing="false" fo:line-height="0.499cm"/>
    </style:style>
    <style:style style:name="P8" style:family="paragraph" style:parent-style-name="Quotations">
      <style:text-properties officeooo:paragraph-rsid="00182bef"/>
    </style:style>
    <style:style style:name="P9" style:family="paragraph" style:parent-style-name="Quotations" style:list-style-name="L2">
      <style:paragraph-properties fo:margin-top="0cm" fo:margin-bottom="0cm" style:contextual-spacing="false"/>
    </style:style>
    <style:style style:name="P10" style:family="paragraph" style:parent-style-name="Quotations">
      <style:text-properties fo:font-size="16pt" fo:font-weight="bold" style:font-size-asian="16pt" style:font-weight-asian="bold" style:font-size-complex="16pt" style:font-weight-complex="bold"/>
    </style:style>
    <style:style style:name="P11" style:family="paragraph" style:parent-style-name="Quotations">
      <style:paragraph-properties fo:margin-top="0cm" fo:margin-bottom="0cm" style:contextual-spacing="false"/>
    </style:style>
    <style:style style:name="P12" style:family="paragraph" style:parent-style-name="Quotations">
      <style:paragraph-properties fo:margin-left="0cm" fo:text-indent="0cm" style:auto-text-indent="false"/>
    </style:style>
    <style:style style:name="P13" style:family="paragraph" style:parent-style-name="Quotations">
      <style:text-properties fo:font-size="16pt" fo:font-weight="bold" officeooo:paragraph-rsid="00182bef" style:font-size-asian="16pt" style:font-weight-asian="bold" style:font-size-complex="16pt" style:font-weight-complex="bold"/>
    </style:style>
    <style:style style:name="P14" style:family="paragraph" style:parent-style-name="Quotations" style:list-style-name="L3">
      <style:paragraph-properties fo:margin-top="0cm" fo:margin-bottom="0cm" style:contextual-spacing="false"/>
    </style:style>
    <style:style style:name="P15" style:family="paragraph" style:parent-style-name="Quotations" style:list-style-name="L4">
      <style:paragraph-properties fo:margin-top="0cm" fo:margin-bottom="0cm" style:contextual-spacing="false"/>
    </style:style>
    <style:style style:name="P16" style:family="paragraph" style:parent-style-name="Quotations" style:list-style-name="L5">
      <style:paragraph-properties fo:margin-top="0cm" fo:margin-bottom="0cm" style:contextual-spacing="false"/>
    </style:style>
    <style:style style:name="P17" style:family="paragraph" style:parent-style-name="Quotations" style:list-style-name="L6">
      <style:paragraph-properties fo:margin-top="0cm" fo:margin-bottom="0cm" style:contextual-spacing="false"/>
    </style:style>
    <style:style style:name="P18" style:family="paragraph" style:parent-style-name="Quotations" style:list-style-name="L7">
      <style:paragraph-properties fo:margin-top="0cm" fo:margin-bottom="0cm" style:contextual-spacing="false"/>
    </style:style>
    <style:style style:name="P19" style:family="paragraph" style:parent-style-name="Quotations" style:list-style-name="L8">
      <style:paragraph-properties fo:margin-top="0cm" fo:margin-bottom="0cm" style:contextual-spacing="false"/>
    </style:style>
    <style:style style:name="P20" style:family="paragraph" style:parent-style-name="Quotations" style:list-style-name="L9">
      <style:paragraph-properties fo:margin-top="0cm" fo:margin-bottom="0cm" style:contextual-spacing="false"/>
    </style:style>
    <style:style style:name="P21" style:family="paragraph" style:parent-style-name="Quotations">
      <style:text-properties fo:font-weight="bold" style:font-weight-asian="bold" style:font-weight-complex="bold"/>
    </style:style>
    <style:style style:name="P22" style:family="paragraph" style:parent-style-name="Quotations" style:list-style-name="L10">
      <style:paragraph-properties fo:margin-top="0cm" fo:margin-bottom="0cm" style:contextual-spacing="false"/>
    </style:style>
    <style:style style:name="P23" style:family="paragraph" style:parent-style-name="Quotations" style:list-style-name="L11">
      <style:paragraph-properties fo:margin-top="0cm" fo:margin-bottom="0cm" style:contextual-spacing="false"/>
    </style:style>
    <style:style style:name="P24" style:family="paragraph" style:parent-style-name="Quotations" style:list-style-name="L12">
      <style:paragraph-properties fo:margin-top="0cm" fo:margin-bottom="0cm" style:contextual-spacing="false"/>
    </style:style>
    <style:style style:name="P25" style:family="paragraph" style:parent-style-name="Quotations" style:list-style-name="L13">
      <style:paragraph-properties fo:margin-top="0cm" fo:margin-bottom="0cm" style:contextual-spacing="false"/>
    </style:style>
    <style:style style:name="P26" style:family="paragraph" style:parent-style-name="Quotations" style:list-style-name="L14"/>
    <style:style style:name="P27" style:family="paragraph" style:parent-style-name="Standard">
      <style:text-properties officeooo:rsid="00182bef" officeooo:paragraph-rsid="00182bef"/>
    </style:style>
    <style:style style:name="P28" style:family="paragraph" style:parent-style-name="Quotations">
      <style:paragraph-properties fo:margin-left="0cm" fo:text-indent="0cm" style:auto-text-indent="false"/>
      <style:text-properties officeooo:rsid="0019e251" officeooo:paragraph-rsid="0019e251"/>
    </style:style>
    <style:style style:name="P29" style:family="paragraph" style:parent-style-name="Quotations">
      <style:text-properties officeooo:paragraph-rsid="0019e251"/>
    </style:style>
    <style:style style:name="P30" style:family="paragraph" style:parent-style-name="Quotations">
      <style:text-properties fo:font-size="16pt" fo:font-weight="bold" officeooo:rsid="001b1962" officeooo:paragraph-rsid="001b1962" style:font-size-asian="16pt" style:font-weight-asian="bold" style:font-size-complex="16pt" style:font-weight-complex="bold"/>
    </style:style>
    <style:style style:name="P31" style:family="paragraph" style:parent-style-name="Quotations" style:list-style-name="L15">
      <style:paragraph-properties fo:margin-top="0cm" fo:margin-bottom="0cm" style:contextual-spacing="false"/>
    </style:style>
    <style:style style:name="P32" style:family="paragraph" style:parent-style-name="Quotations" style:list-style-name="L16">
      <style:paragraph-properties fo:margin-top="0cm" fo:margin-bottom="0cm" style:contextual-spacing="false"/>
    </style:style>
    <style:style style:name="P33" style:family="paragraph" style:parent-style-name="Quotations" style:list-style-name="L17">
      <style:paragraph-properties fo:margin-top="0cm" fo:margin-bottom="0cm" style:contextual-spacing="false"/>
    </style:style>
    <style:style style:name="P34" style:family="paragraph" style:parent-style-name="Quotations" style:list-style-name="L18">
      <style:paragraph-properties fo:margin-top="0cm" fo:margin-bottom="0cm" style:contextual-spacing="false"/>
    </style:style>
    <style:style style:name="P35" style:family="paragraph" style:parent-style-name="Quotations" style:list-style-name="L19">
      <style:paragraph-properties fo:margin-top="0cm" fo:margin-bottom="0cm" style:contextual-spacing="false"/>
    </style:style>
    <style:style style:name="P36" style:family="paragraph" style:parent-style-name="Quotations" style:list-style-name="L20">
      <style:paragraph-properties fo:margin-top="0cm" fo:margin-bottom="0cm" style:contextual-spacing="false"/>
    </style:style>
    <style:style style:name="P37" style:family="paragraph" style:parent-style-name="Text_20_body">
      <style:text-properties officeooo:rsid="001c41bd" officeooo:paragraph-rsid="0021f15a"/>
    </style:style>
    <style:style style:name="P38" style:family="paragraph" style:parent-style-name="Text_20_body" style:list-style-name="L21">
      <style:paragraph-properties fo:margin-top="0cm" fo:margin-bottom="0cm" style:contextual-spacing="false"/>
      <style:text-properties officeooo:rsid="001e76c8" officeooo:paragraph-rsid="00218a81"/>
    </style:style>
    <style:style style:name="P39" style:family="paragraph" style:parent-style-name="Text_20_body">
      <style:text-properties officeooo:rsid="001e76c8" officeooo:paragraph-rsid="0020e41b"/>
    </style:style>
    <style:style style:name="P40" style:family="paragraph" style:parent-style-name="Text_20_body" style:list-style-name="L22">
      <style:paragraph-properties fo:margin-top="0cm" fo:margin-bottom="0cm" style:contextual-spacing="false"/>
      <style:text-properties officeooo:rsid="001e76c8" officeooo:paragraph-rsid="001e76c8"/>
    </style:style>
    <style:style style:name="P41" style:family="paragraph" style:parent-style-name="Text_20_body" style:list-style-name="L22">
      <style:paragraph-properties fo:margin-top="0cm" fo:margin-bottom="0cm" style:contextual-spacing="false"/>
      <style:text-properties officeooo:rsid="001fc108" officeooo:paragraph-rsid="001fc108"/>
    </style:style>
    <style:style style:name="P42" style:family="paragraph" style:parent-style-name="Text_20_body">
      <style:paragraph-properties fo:margin-top="0cm" fo:margin-bottom="0cm" style:contextual-spacing="false"/>
      <style:text-properties officeooo:rsid="001e76c8" officeooo:paragraph-rsid="001e76c8"/>
    </style:style>
    <style:style style:name="P43" style:family="paragraph" style:parent-style-name="Text_20_body">
      <style:paragraph-properties fo:margin-top="0cm" fo:margin-bottom="0cm" style:contextual-spacing="false"/>
      <style:text-properties officeooo:rsid="0022062d" officeooo:paragraph-rsid="0022062d"/>
    </style:style>
    <style:style style:name="P44" style:family="paragraph" style:parent-style-name="Quotations" style:list-style-name="L23">
      <style:paragraph-properties fo:margin-top="0cm" fo:margin-bottom="0cm" style:contextual-spacing="false"/>
    </style:style>
    <style:style style:name="P45" style:family="paragraph" style:parent-style-name="Quotations" style:list-style-name="L24">
      <style:paragraph-properties fo:margin-top="0cm" fo:margin-bottom="0cm" style:contextual-spacing="false"/>
    </style:style>
    <style:style style:name="P46" style:family="paragraph" style:parent-style-name="Quotations" style:list-style-name="L25">
      <style:paragraph-properties fo:margin-top="0cm" fo:margin-bottom="0cm" style:contextual-spacing="false"/>
    </style:style>
    <style:style style:name="P47" style:family="paragraph" style:parent-style-name="Quotations" style:list-style-name="L26"/>
    <style:style style:name="P48" style:family="paragraph" style:parent-style-name="Quotations">
      <style:text-properties officeooo:paragraph-rsid="00225c6d"/>
    </style:style>
    <style:style style:name="P49" style:family="paragraph" style:parent-style-name="Quotations">
      <style:text-properties fo:font-size="16pt" fo:font-weight="bold" officeooo:paragraph-rsid="00225c6d" style:font-size-asian="16pt" style:font-weight-asian="bold" style:font-size-complex="16pt" style:font-weight-complex="bold"/>
    </style:style>
    <style:style style:name="P50" style:family="paragraph" style:parent-style-name="Quotations">
      <style:paragraph-properties fo:margin-top="0cm" fo:margin-bottom="0cm" style:contextual-spacing="false"/>
      <style:text-properties officeooo:paragraph-rsid="00225c6d"/>
    </style:style>
    <style:style style:name="P51" style:family="paragraph" style:parent-style-name="Quotations">
      <style:paragraph-properties fo:margin-top="0cm" fo:margin-bottom="0cm" style:contextual-spacing="false"/>
      <style:text-properties fo:font-size="16pt" fo:font-weight="bold" style:font-size-asian="16pt" style:font-weight-asian="bold" style:font-size-complex="16pt" style:font-weight-complex="bold"/>
    </style:style>
    <style:style style:name="P52" style:family="paragraph" style:parent-style-name="Quotations" style:list-style-name="L27">
      <style:paragraph-properties fo:margin-top="0cm" fo:margin-bottom="0cm" style:contextual-spacing="false"/>
    </style:style>
    <style:style style:name="P53" style:family="paragraph" style:parent-style-name="Quotations" style:list-style-name="L28">
      <style:paragraph-properties fo:margin-top="0cm" fo:margin-bottom="0cm" style:contextual-spacing="false"/>
    </style:style>
    <style:style style:name="P54" style:family="paragraph" style:parent-style-name="Quotations" style:list-style-name="L29">
      <style:paragraph-properties fo:margin-top="0cm" fo:margin-bottom="0cm" style:contextual-spacing="false"/>
    </style:style>
    <style:style style:name="P55" style:family="paragraph" style:parent-style-name="Quotations" style:list-style-name="L30">
      <style:paragraph-properties fo:margin-top="0cm" fo:margin-bottom="0cm" style:contextual-spacing="false"/>
    </style:style>
    <style:style style:name="P56" style:family="paragraph" style:parent-style-name="Quotations" style:list-style-name="L31">
      <style:paragraph-properties fo:margin-top="0cm" fo:margin-bottom="0cm" style:contextual-spacing="false"/>
    </style:style>
    <style:style style:name="P57" style:family="paragraph" style:parent-style-name="Quotations" style:list-style-name="L32">
      <style:paragraph-properties fo:margin-top="0cm" fo:margin-bottom="0cm" style:contextual-spacing="false"/>
    </style:style>
    <style:style style:name="P58" style:family="paragraph" style:parent-style-name="Quotations" style:list-style-name="L33">
      <style:paragraph-properties fo:margin-top="0cm" fo:margin-bottom="0cm" style:contextual-spacing="false"/>
    </style:style>
    <style:style style:name="P59" style:family="paragraph" style:parent-style-name="Quotations" style:list-style-name="L34">
      <style:paragraph-properties fo:margin-top="0cm" fo:margin-bottom="0cm" style:contextual-spacing="false"/>
    </style:style>
    <style:style style:name="P60" style:family="paragraph" style:parent-style-name="Quotations" style:list-style-name="L34">
      <style:paragraph-properties fo:margin-top="0cm" fo:margin-bottom="0cm" style:contextual-spacing="false"/>
      <style:text-properties officeooo:rsid="00237ee4" officeooo:paragraph-rsid="00237ee4"/>
    </style:style>
    <style:style style:name="T1" style:family="text">
      <style:text-properties officeooo:rsid="0016f8cc"/>
    </style:style>
    <style:style style:name="T2" style:family="text">
      <style:text-properties fo:font-size="16pt" style:font-size-asian="16pt" style:font-size-complex="16pt"/>
    </style:style>
    <style:style style:name="T3" style:family="text">
      <style:text-properties officeooo:rsid="0019e251"/>
    </style:style>
    <style:style style:name="T4" style:family="text">
      <style:text-properties officeooo:rsid="001d1adf"/>
    </style:style>
    <style:style style:name="T5" style:family="text">
      <style:text-properties officeooo:rsid="001e76c8"/>
    </style:style>
    <style:style style:name="T6" style:family="text">
      <style:text-properties officeooo:rsid="0020e41b"/>
    </style:style>
    <style:style style:name="T7" style:family="text">
      <style:text-properties officeooo:rsid="00218a81"/>
    </style:style>
    <style:style style:name="T8" style:family="text">
      <style:text-properties fo:font-weight="bold" style:font-weight-asian="bold" style:font-weight-complex="bol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May 2026, <text:span text:style-name="T1">I started a conversation with ChatGPT to help me start a game I wanted to build. This game would be inspired by the original Crack Down game by Sega from 1989, I game I played obsessively at the local arcades in England at the time. Since that time I’ve become a business application developer but I’ve never lost interest in taking those skills and applying them to game building. Over the years most of my attempts (from VB6 to .Net) have harkened back to Crack Down in one way or another, so it’s no surprise that this is inspiration for what I hope to be my first complete game build.</text:span></text:p>
      <text:p text:style-name="P1">The chat started like this:</text:p>
      <text:p text:style-name="P2">I want to create a game using threeJS that is based on Crackdown the Sega game from 1989 still for two players. Would you be able to help with that? </text:p>
      <text:p text:style-name="P3">ChatGPT and I had been regular talkers regarding my career and abilities at that point, so it launched firmly into a plan of attack:</text:p>
      <text:p text:style-name="P4"/>
      <text:p text:style-name="Quotations">Yes — and it’s a great idea. A modern browser-based take on something like Crack Down using Three.js is very doable, especially given your background.</text:p>
      <text:p text:style-name="Quotations">Let me ground this first though: don’t try to “recreate Crackdown” wholesale. That’s where projects stall. Instead, build a <text:span text:style-name="Strong_20_Emphasis">tight vertical slice</text:span> that captures the feel:</text:p>
      <text:list text:style-name="L1">
        <text:list-item>
          <text:p text:style-name="P5">top-down (or slight isometric) view </text:p>
        </text:list-item>
        <text:list-item>
          <text:p text:style-name="P5">twin-stick movement + shooting </text:p>
        </text:list-item>
        <text:list-item>
          <text:p text:style-name="P6">bombs / area attacks </text:p>
        </text:list-item>
        <text:list-item>
          <text:p text:style-name="P6">co-op 2-player </text:p>
        </text:list-item>
        <text:list-item>
          <text:p text:style-name="P6">simple enemy AI waves </text:p>
        </text:list-item>
      </text:list>
      <text:p text:style-name="P7"/>
      <text:p text:style-name="P8">If you get <text:span text:style-name="Emphasis">that</text:span> working smoothly, you’ve basically got the core game.</text:p>
      <text:p text:style-name="P8">What you’re really building (under the hood)</text:p>
      <text:p text:style-name="Quotations">Even though it looks simple, you’re combining a few systems:</text:p>
      <text:list text:style-name="L2">
        <text:list-item>
          <text:p text:style-name="P9"><text:span text:style-name="Strong_20_Emphasis">Rendering</text:span> → Three.js scene, camera, lighting </text:p>
        </text:list-item>
        <text:list-item>
          <text:p text:style-name="P9"><text:span text:style-name="Strong_20_Emphasis">Game loop</text:span> → update + render cycle </text:p>
        </text:list-item>
        <text:list-item>
          <text:p text:style-name="P9"><text:span text:style-name="Strong_20_Emphasis">Input</text:span> → keyboard + gamepads (2 players) </text:p>
        </text:list-item>
        <text:list-item>
          <text:p text:style-name="P9"><text:span text:style-name="Strong_20_Emphasis">Physics-lite</text:span> → movement + collision (no heavy physics engine needed) </text:p>
        </text:list-item>
        <text:list-item>
          <text:p text:style-name="P9"><text:span text:style-name="Strong_20_Emphasis">Entities</text:span> → players, enemies, bullets, pickups </text:p>
        </text:list-item>
        <text:list-item>
          <text:p text:style-name="P9"><text:span text:style-name="Strong_20_Emphasis">State</text:span> → score, lives, waves </text:p>
          <text:p text:style-name="P9"/>
        </text:list-item>
      </text:list>
      <text:p text:style-name="P10">Suggested architecture (keep it lean)</text:p>
      <text:p text:style-name="Quotations">Use something like this:</text:p>
      <text:section text:style-name="Sect1" text:name="code-block-viewer">
        <text:p text:style-name="P11"><text:span text:style-name="Source_20_Text">/src</text:span></text:p>
        <text:p text:style-name="P11"><text:span text:style-name="Source_20_Text"><text:s text:c="2"/>/core</text:span></text:p>
        <text:p text:style-name="P11"><text:span text:style-name="Source_20_Text"><text:s text:c="4"/>Game.js</text:span></text:p>
        <text:p text:style-name="P11"><text:span text:style-name="Source_20_Text"><text:s text:c="4"/>Input.js</text:span></text:p>
        <text:p text:style-name="P11"><text:span text:style-name="Source_20_Text"><text:s text:c="4"/>Loop.js</text:span></text:p>
        <text:p text:style-name="P11"><text:soft-page-break/><text:span text:style-name="Source_20_Text"><text:s text:c="2"/>/entities</text:span></text:p>
        <text:p text:style-name="P11"><text:span text:style-name="Source_20_Text"><text:s text:c="4"/>Player.js</text:span></text:p>
        <text:p text:style-name="P11"><text:span text:style-name="Source_20_Text"><text:s text:c="4"/>Enemy.js</text:span></text:p>
        <text:p text:style-name="P11"><text:span text:style-name="Source_20_Text"><text:s text:c="4"/>Bullet.js</text:span></text:p>
        <text:p text:style-name="P11"><text:span text:style-name="Source_20_Text"><text:s text:c="2"/>/systems</text:span></text:p>
        <text:p text:style-name="P11"><text:span text:style-name="Source_20_Text"><text:s text:c="4"/>CollisionSystem.js</text:span></text:p>
        <text:p text:style-name="P11"><text:span text:style-name="Source_20_Text"><text:s text:c="4"/>EnemySpawner.js</text:span></text:p>
        <text:p text:style-name="P11"><text:span text:style-name="Source_20_Text"><text:s text:c="2"/>/scenes</text:span></text:p>
        <text:p text:style-name="P11"><text:span text:style-name="Source_20_Text"><text:s text:c="4"/>MainScene.js</text:span></text:p>
        <text:p text:style-name="P11"/>
      </text:section>
      <text:p text:style-name="P12"/>
      <text:p text:style-name="P8">Avoid over-engineering early — no need for full ECS unless you feel it’s worth it later.</text:p>
      <text:p text:style-name="P13">Tech stack (simple + modern)</text:p>
      <text:list text:style-name="L3">
        <text:list-item>
          <text:p text:style-name="P14">Three.js (rendering) </text:p>
        </text:list-item>
        <text:list-item>
          <text:p text:style-name="P14">Vite (fast dev server) </text:p>
        </text:list-item>
        <text:list-item>
          <text:p text:style-name="P14">Vanilla JS or TypeScript (your call — TS helps as it grows) </text:p>
        </text:list-item>
        <text:list-item>
          <text:p text:style-name="P14">Optional later: </text:p>
          <text:list>
            <text:list-item>
              <text:p text:style-name="P14">Zustand or simple state store </text:p>
            </text:list-item>
            <text:list-item>
              <text:p text:style-name="P14">Socket.io (if you ever go online multiplayer) </text:p>
            </text:list-item>
          </text:list>
        </text:list-item>
      </text:list>
      <text:p text:style-name="P11"/>
      <text:p text:style-name="P10">Core prototype steps</text:p>
      <text:p text:style-name="P11">1. Basic scene + camera</text:p>
      <text:list text:style-name="L4">
        <text:list-item>
          <text:p text:style-name="P15">Orthographic camera (better for that arcade feel) </text:p>
        </text:list-item>
        <text:list-item>
          <text:p text:style-name="P15">Flat plane as the “floor” </text:p>
        </text:list-item>
      </text:list>
      <text:p text:style-name="P11">2. One player that can move + shoot</text:p>
      <text:list text:style-name="L5">
        <text:list-item>
          <text:p text:style-name="P16">WASD movement </text:p>
        </text:list-item>
        <text:list-item>
          <text:p text:style-name="P16">Mouse or arrow keys for direction shooting </text:p>
        </text:list-item>
      </text:list>
      <text:p text:style-name="P11">3. Second player</text:p>
      <text:list text:style-name="L6">
        <text:list-item>
          <text:p text:style-name="P17">Keyboard split OR gamepad support </text:p>
        </text:list-item>
      </text:list>
      <text:p text:style-name="P11">4. Enemies</text:p>
      <text:list text:style-name="L7">
        <text:list-item>
          <text:p text:style-name="P18">Move toward nearest player </text:p>
        </text:list-item>
        <text:list-item>
          <text:p text:style-name="P18">Die when hit </text:p>
        </text:list-item>
      </text:list>
      <text:p text:style-name="P11">5. Shooting + bombs</text:p>
      <text:list text:style-name="L8">
        <text:list-item>
          <text:p text:style-name="P19">Bullets = simple meshes </text:p>
        </text:list-item>
        <text:list-item>
          <text:p text:style-name="P19">Bomb = radial damage </text:p>
        </text:list-item>
      </text:list>
      <text:p text:style-name="P11">6. Game loop polish</text:p>
      <text:list text:style-name="L9">
        <text:list-item>
          <text:p text:style-name="P20">Spawn waves </text:p>
        </text:list-item>
        <text:list-item>
          <text:p text:style-name="P20">Add score </text:p>
        </text:list-item>
        <text:list-item>
          <text:p text:style-name="P20">Add basic UI overlay (HTML is fine) </text:p>
        </text:list-item>
      </text:list>
      <text:p text:style-name="Quotations"/>
      <text:p text:style-name="P21"/>
      <text:p text:style-name="P21"/>
      <text:p text:style-name="P21"><text:soft-page-break/><text:span text:style-name="T2">Example: minimal game loop (Three.js)</text:span></text:p>
      <text:section text:style-name="Sect1" text:name="Section1">
        <text:p text:style-name="P11"><text:bookmark text:name="code-block-viewer"/><text:span text:style-name="Source_20_Text">function animate(time) {</text:span></text:p>
        <text:p text:style-name="P11"><text:span text:style-name="Source_20_Text"><text:s text:c="2"/>requestAnimationFrame(animate);</text:span></text:p>
        <text:p text:style-name="P11"><text:span text:style-name="Source_20_Text"><text:s text:c="2"/>const delta = clock.getDelta();</text:span></text:p>
        <text:p text:style-name="P11"><text:span text:style-name="Source_20_Text"><text:s text:c="2"/>updateGame(delta); // movement, AI, collisions</text:span></text:p>
        <text:p text:style-name="P11"><text:span text:style-name="Source_20_Text"><text:s text:c="2"/>renderer.render(scene, camera);</text:span></text:p>
        <text:p text:style-name="P11"><text:span text:style-name="Source_20_Text">}</text:span></text:p>
        <text:p text:style-name="P11"><text:span text:style-name="Source_20_Text"/></text:p>
      </text:section>
      <text:p text:style-name="P10">Multiplayer (local co-op)</text:p>
      <text:p text:style-name="Quotations">Start <text:span text:style-name="Strong_20_Emphasis">local only</text:span>:</text:p>
      <text:list text:style-name="L10">
        <text:list-item>
          <text:p text:style-name="P22">Player 1 → WASD + Space </text:p>
        </text:list-item>
        <text:list-item>
          <text:p text:style-name="P22">Player 2 → Arrow keys + Enter </text:p>
        </text:list-item>
      </text:list>
      <text:p text:style-name="P11"/>
      <text:p text:style-name="Quotations">Then add:</text:p>
      <text:list text:style-name="L11">
        <text:list-item>
          <text:p text:style-name="P23">Gamepad API (this is where it starts to feel like a real arcade game) </text:p>
          <text:p text:style-name="P23"/>
        </text:list-item>
      </text:list>
      <text:p text:style-name="P10">Visual style (important shortcut)</text:p>
      <text:p text:style-name="Quotations">Don’t go realistic. Lean into:</text:p>
      <text:list text:style-name="L12">
        <text:list-item>
          <text:p text:style-name="P24">low-poly or flat shading </text:p>
        </text:list-item>
        <text:list-item>
          <text:p text:style-name="P24">bright colors </text:p>
        </text:list-item>
        <text:list-item>
          <text:p text:style-name="P24">simple geometry </text:p>
          <text:p text:style-name="P24"/>
        </text:list-item>
      </text:list>
      <text:p text:style-name="Quotations">This massively reduces effort while still looking intentional.</text:p>
      <text:p text:style-name="P10">Where this can go (if it clicks)</text:p>
      <text:p text:style-name="Quotations">Once the core works, you can layer in:</text:p>
      <text:list text:style-name="L13">
        <text:list-item>
          <text:p text:style-name="P25">destructible environments </text:p>
        </text:list-item>
        <text:list-item>
          <text:p text:style-name="P25">power-ups </text:p>
        </text:list-item>
        <text:list-item>
          <text:p text:style-name="P25">time-based objectives (very Crackdown-like) </text:p>
        </text:list-item>
        <text:list-item>
          <text:p text:style-name="P25">sound + juice (screen shake, particles, flashes) </text:p>
        </text:list-item>
      </text:list>
      <text:p text:style-name="P11"/>
      <text:p text:style-name="Quotations">One thing I’d push you on</text:p>
      <text:p text:style-name="Quotations">The biggest risk isn’t technical — it’s scope creep.</text:p>
      <text:p text:style-name="Quotations">If your first milestone isn’t something like:</text:p>
      <text:p text:style-name="Quotations">“Two players, one screen, can move and shoot enemies for 60 seconds”</text:p>
      <text:p text:style-name="Quotations">…then you’re already overbuilding.</text:p>
      <text:p text:style-name="Quotations"><text:soft-page-break/>If you want, I can help you next with:</text:p>
      <text:list text:style-name="L14">
        <text:list-item>
          <text:p text:style-name="P26">a <text:span text:style-name="Strong_20_Emphasis">starter project scaffold (Vite + Three.js)</text:span> </text:p>
        </text:list-item>
        <text:list-item>
          <text:p text:style-name="P26">a <text:span text:style-name="Strong_20_Emphasis">Player controller implementation</text:span> </text:p>
        </text:list-item>
        <text:list-item>
          <text:p text:style-name="P26">or a <text:span text:style-name="Strong_20_Emphasis">2-player input system (keyboard + gamepad)</text:span> </text:p>
        </text:list-item>
      </text:list>
      <text:p text:style-name="Quotations">Just tell me how hands-on you want to go — quick prototype vs something more structured.</text:p>
      <text:p text:style-name="P27">So that’s how we started. <text:span text:style-name="T3">I’ve done some of these things before, very much rolled my own code from the get-go, but I wanted to see how different or far away I was from what would be recommended:</text:span></text:p>
      <text:p text:style-name="P27"/>
      <text:p text:style-name="P2">Glad to see it seems doable. Could you help me with a starter project using Vite + Three.js, a quick prototype approach so that I can look into it in more detail</text:p>
      <text:p text:style-name="P28">I’m in the middle of a Thee.JS course, already handled scenes, camera, lights, material, mesh, animations, input etc.. how far different would I be?</text:p>
      <text:p text:style-name="P10">Quick Prototype Starter (Vite + Three.js)</text:p>
      <text:p text:style-name="Quotations">This setup is aimed at getting you from zero → “two cubes running around shooting” as fast as possible.</text:p>
      <text:p text:style-name="P10">1. Create the project</text:p>
      <text:p text:style-name="P29">Open a terminal:</text:p>
      <text:section text:style-name="Sect1" text:name="Section2">
        <text:p text:style-name="Quotations"><text:bookmark text:name="code-block-viewer Copy 1"/><text:span text:style-name="Source_20_Text">npm create vite@latest crackdown-prototype -- --template vanilla</text:span></text:p>
      </text:section>
      <text:p text:style-name="P29">Go into the folder:</text:p>
      <text:section text:style-name="Sect1" text:name="Section3">
        <text:p text:style-name="Quotations"><text:bookmark text:name="code-block-viewer Copy 2"/><text:span text:style-name="Source_20_Text">cd crackdown-prototype</text:span></text:p>
      </text:section>
      <text:p text:style-name="Quotations">Install dependencies:</text:p>
      <text:section text:style-name="Sect1" text:name="Section4">
        <text:p text:style-name="Quotations"><text:bookmark text:name="code-block-viewer Copy 3"/><text:span text:style-name="Source_20_Text">npm install three</text:span></text:p>
      </text:section>
      <text:p text:style-name="Quotations">Start the dev server:</text:p>
      <text:section text:style-name="Sect1" text:name="Section5">
        <text:p text:style-name="Quotations"><text:bookmark text:name="code-block-viewer Copy 4"/><text:span text:style-name="Source_20_Text">npm run dev</text:span></text:p>
      </text:section>
      <text:p text:style-name="Quotations"/>
      <text:p text:style-name="P10"/>
      <text:p text:style-name="P10"><text:soft-page-break/>2. Project structure</text:p>
      <text:p text:style-name="Quotations">Replace the default structure with this:</text:p>
      <text:section text:style-name="Sect1" text:name="Section6">
        <text:p text:style-name="P11"><text:bookmark text:name="code-block-viewer Copy 5"/><text:span text:style-name="Source_20_Text">/src</text:span></text:p>
        <text:p text:style-name="P11"><text:span text:style-name="Source_20_Text"><text:s text:c="2"/>main.js</text:span></text:p>
        <text:p text:style-name="P11"><text:span text:style-name="Source_20_Text"><text:s text:c="2"/>style.css</text:span></text:p>
        <text:p text:style-name="P11"><text:span text:style-name="Source_20_Text"><text:s text:c="2"/>/core</text:span></text:p>
        <text:p text:style-name="P11"><text:span text:style-name="Source_20_Text"><text:s text:c="4"/>Game.js</text:span></text:p>
        <text:p text:style-name="P11"><text:span text:style-name="Source_20_Text"><text:s text:c="4"/>Input.js</text:span></text:p>
        <text:p text:style-name="P11"><text:span text:style-name="Source_20_Text"><text:s text:c="2"/>/entities</text:span></text:p>
        <text:p text:style-name="P11"><text:span text:style-name="Source_20_Text"><text:s text:c="4"/>Player.js</text:span></text:p>
        <text:p text:style-name="P11"><text:span text:style-name="Source_20_Text"><text:s text:c="4"/>Bullet.js</text:span></text:p>
        <text:p text:style-name="P11"/>
      </text:section>
      <text:p text:style-name="P10">3. main.js</text:p>
      <text:section text:style-name="Sect1" text:name="Section7">
        <text:p text:style-name="P11"><text:bookmark text:name="code-block-viewer Copy 6"/><text:span text:style-name="Source_20_Text">import './style.css';</text:span></text:p>
        <text:p text:style-name="P11"><text:span text:style-name="Source_20_Text">import { Game } from './core/Game';</text:span></text:p>
        <text:p text:style-name="P11"><text:span text:style-name="Source_20_Text">const game = new Game();</text:span></text:p>
        <text:p text:style-name="P11"><text:span text:style-name="Source_20_Text">game.start();</text:span></text:p>
        <text:p text:style-name="P11"/>
      </text:section>
      <text:p text:style-name="P10">4. style.css</text:p>
      <text:section text:style-name="Sect1" text:name="Section8">
        <text:p text:style-name="P11"><text:bookmark text:name="code-block-viewer Copy 7"/><text:span text:style-name="Source_20_Text">body {</text:span></text:p>
        <text:p text:style-name="P11"><text:span text:style-name="Source_20_Text"><text:s text:c="2"/>margin: 0;</text:span></text:p>
        <text:p text:style-name="P11"><text:span text:style-name="Source_20_Text"><text:s text:c="2"/>overflow: hidden;</text:span></text:p>
        <text:p text:style-name="P11"><text:span text:style-name="Source_20_Text"><text:s text:c="2"/>background: black;</text:span></text:p>
        <text:p text:style-name="P11"><text:span text:style-name="Source_20_Text">}</text:span></text:p>
        <text:p text:style-name="P11"><text:span text:style-name="Source_20_Text">canvas {</text:span></text:p>
        <text:p text:style-name="P11"><text:span text:style-name="Source_20_Text"><text:s text:c="2"/>display: block;</text:span></text:p>
        <text:p text:style-name="P11"><text:span text:style-name="Source_20_Text">}</text:span></text:p>
        <text:p text:style-name="P11"/>
      </text:section>
      <text:p text:style-name="P10">5. core/Input.js</text:p>
      <text:p text:style-name="Quotations">This gives simple keyboard tracking.</text:p>
      <text:section text:style-name="Sect1" text:name="Section9">
        <text:p text:style-name="P11"><text:bookmark text:name="code-block-viewer Copy 8"/><text:span text:style-name="Source_20_Text">export class Input {</text:span></text:p>
        <text:p text:style-name="P11"><text:span text:style-name="Source_20_Text"><text:s text:c="2"/>constructor() {</text:span></text:p>
        <text:p text:style-name="P11"><text:span text:style-name="Source_20_Text"><text:s text:c="4"/>this.keys = {};</text:span></text:p>
        <text:p text:style-name="P11"><text:span text:style-name="Source_20_Text"><text:s text:c="4"/>window.addEventListener('keydown', (e) =&gt; {</text:span></text:p>
        <text:p text:style-name="P11"><text:span text:style-name="Source_20_Text"><text:s text:c="6"/>this.keys[e.code] = true;</text:span></text:p>
        <text:p text:style-name="P11"><text:span text:style-name="Source_20_Text"><text:s text:c="4"/>});</text:span></text:p>
        <text:p text:style-name="P11"><text:span text:style-name="Source_20_Text"><text:s text:c="4"/>window.addEventListener('keyup', (e) =&gt; {</text:span></text:p>
        <text:p text:style-name="P11"><text:span text:style-name="Source_20_Text"><text:s text:c="6"/>this.keys[e.code] = false;</text:span></text:p>
        <text:p text:style-name="P11"><text:span text:style-name="Source_20_Text"><text:s text:c="4"/>});</text:span></text:p>
        <text:p text:style-name="P11"><text:span text:style-name="Source_20_Text"><text:s text:c="2"/>}</text:span></text:p>
        <text:p text:style-name="P11"><text:span text:style-name="Source_20_Text"><text:s text:c="2"/>isDown(key) {</text:span></text:p>
        <text:p text:style-name="P11"><text:span text:style-name="Source_20_Text"><text:s text:c="4"/>return !!this.keys[key];</text:span></text:p>
        <text:p text:style-name="P11"><text:span text:style-name="Source_20_Text"><text:s text:c="2"/>}</text:span></text:p>
        <text:p text:style-name="P11"><text:span text:style-name="Source_20_Text">}</text:span></text:p>
        <text:p text:style-name="P11"/>
      </text:section>
      <text:p text:style-name="P10"><text:soft-page-break/>6. entities/Bullet.js</text:p>
      <text:section text:style-name="Sect1" text:name="Section10">
        <text:p text:style-name="P11"><text:bookmark text:name="code-block-viewer Copy 9"/><text:span text:style-name="Source_20_Text">import * as THREE from 'three';</text:span></text:p>
        <text:p text:style-name="P11"><text:span text:style-name="Source_20_Text">export class Bullet {</text:span></text:p>
        <text:p text:style-name="P11"><text:span text:style-name="Source_20_Text"><text:s text:c="2"/>constructor(position, direction) {</text:span></text:p>
        <text:p text:style-name="P11"><text:span text:style-name="Source_20_Text"><text:s text:c="4"/>const geometry = new THREE.BoxGeometry(0.1, 0.1, 0.1);</text:span></text:p>
        <text:p text:style-name="P11"><text:span text:style-name="Source_20_Text"><text:s text:c="4"/>const material = new THREE.MeshBasicMaterial({ color: 0xffff00 });</text:span></text:p>
        <text:p text:style-name="P11"><text:span text:style-name="Source_20_Text"><text:s text:c="4"/>this.mesh = new THREE.Mesh(geometry, material);</text:span></text:p>
        <text:p text:style-name="P11"><text:span text:style-name="Source_20_Text"><text:s text:c="4"/>this.mesh.position.copy(position);</text:span></text:p>
        <text:p text:style-name="P11"><text:span text:style-name="Source_20_Text"><text:s text:c="4"/>this.velocity = direction.clone().multiplyScalar(10);</text:span></text:p>
        <text:p text:style-name="P11"><text:span text:style-name="Source_20_Text"><text:s text:c="2"/>}</text:span></text:p>
        <text:p text:style-name="P11"><text:span text:style-name="Source_20_Text"><text:s text:c="2"/>update(delta) {</text:span></text:p>
        <text:p text:style-name="P11"><text:span text:style-name="Source_20_Text"><text:s text:c="4"/>this.mesh.position.add(</text:span></text:p>
        <text:p text:style-name="P11"><text:span text:style-name="Source_20_Text"><text:s text:c="6"/>this.velocity.clone().multiplyScalar(delta)</text:span></text:p>
        <text:p text:style-name="P11"><text:span text:style-name="Source_20_Text"><text:s text:c="4"/>);</text:span></text:p>
        <text:p text:style-name="P11"><text:span text:style-name="Source_20_Text"><text:s text:c="2"/>}</text:span></text:p>
        <text:p text:style-name="P11"><text:span text:style-name="Source_20_Text">}</text:span></text:p>
        <text:p text:style-name="P11"/>
      </text:section>
      <text:p text:style-name="P30">7. entities/Player.js</text:p>
      <text:p text:style-name="Quotations">This is intentionally simple and arcade-like.</text:p>
      <text:section text:style-name="Sect1" text:name="Section11">
        <text:p text:style-name="P11"><text:bookmark text:name="code-block-viewer Copy 10"/><text:span text:style-name="Source_20_Text">import * as THREE from 'three';</text:span></text:p>
        <text:p text:style-name="P11"><text:span text:style-name="Source_20_Text">import { Bullet } from './Bullet';</text:span></text:p>
        <text:p text:style-name="P11"><text:span text:style-name="Source_20_Text">export class Player {</text:span></text:p>
        <text:p text:style-name="P11"><text:span text:style-name="Source_20_Text"><text:s text:c="2"/>constructor(color, controls) {</text:span></text:p>
        <text:p text:style-name="P11"><text:span text:style-name="Source_20_Text"><text:s text:c="4"/>this.controls = controls;</text:span></text:p>
        <text:p text:style-name="P11"><text:span text:style-name="Source_20_Text"><text:s text:c="4"/>const geometry = new THREE.BoxGeometry(1, 1, 1);</text:span></text:p>
        <text:p text:style-name="P11"><text:span text:style-name="Source_20_Text"><text:s text:c="4"/>const material = new THREE.MeshPhongMaterial({ color });</text:span></text:p>
        <text:p text:style-name="P11"><text:span text:style-name="Source_20_Text"><text:s text:c="4"/>this.mesh = new THREE.Mesh(geometry, material);</text:span></text:p>
        <text:p text:style-name="P11"><text:span text:style-name="Source_20_Text"><text:s text:c="4"/>this.speed = 5;</text:span></text:p>
        <text:p text:style-name="P11"><text:span text:style-name="Source_20_Text"><text:s text:c="4"/>this.bullets = [];</text:span></text:p>
        <text:p text:style-name="P11"><text:span text:style-name="Source_20_Text"><text:s text:c="4"/>this.shootCooldown = 0;</text:span></text:p>
        <text:p text:style-name="P11"><text:span text:style-name="Source_20_Text"><text:s text:c="2"/>}</text:span></text:p>
        <text:p text:style-name="P11"><text:span text:style-name="Source_20_Text"><text:s text:c="2"/>update(delta, input, scene) {</text:span></text:p>
        <text:p text:style-name="P11"><text:span text:style-name="Source_20_Text"><text:s text:c="4"/>const move = new THREE.Vector3();</text:span></text:p>
        <text:p text:style-name="P11"><text:span text:style-name="Source_20_Text"><text:s text:c="4"/>if (input.isDown(this.controls.left)) move.x -= 1;</text:span></text:p>
        <text:p text:style-name="P11"><text:span text:style-name="Source_20_Text"><text:s text:c="4"/>if (input.isDown(this.controls.right)) move.x += 1;</text:span></text:p>
        <text:p text:style-name="P11"><text:span text:style-name="Source_20_Text"><text:s text:c="4"/>if (input.isDown(this.controls.up)) move.z -= 1;</text:span></text:p>
        <text:p text:style-name="P11"><text:span text:style-name="Source_20_Text"><text:s text:c="4"/>if (input.isDown(this.controls.down)) move.z += 1;</text:span></text:p>
        <text:p text:style-name="P11"><text:span text:style-name="Source_20_Text"><text:s text:c="4"/>move.normalize();</text:span></text:p>
        <text:p text:style-name="P11"><text:span text:style-name="Source_20_Text"><text:s text:c="4"/>this.mesh.position.add(</text:span></text:p>
        <text:p text:style-name="P11"><text:span text:style-name="Source_20_Text"><text:s text:c="6"/>move.multiplyScalar(this.speed * delta)</text:span></text:p>
        <text:p text:style-name="P11"><text:span text:style-name="Source_20_Text"><text:s text:c="4"/>);</text:span></text:p>
        <text:p text:style-name="P11"><text:span text:style-name="Source_20_Text"><text:s text:c="4"/>this.shootCooldown -= delta;</text:span></text:p>
        <text:p text:style-name="P11"><text:span text:style-name="Source_20_Text"><text:s text:c="4"/>if (</text:span></text:p>
        <text:p text:style-name="P11"><text:span text:style-name="Source_20_Text"><text:s text:c="6"/>input.isDown(this.controls.fire) &amp;&amp;</text:span></text:p>
        <text:p text:style-name="P11"><text:span text:style-name="Source_20_Text"><text:s text:c="6"/>this.shootCooldown &lt;= 0</text:span></text:p>
        <text:p text:style-name="P11"><text:span text:style-name="Source_20_Text"><text:s text:c="4"/>) {</text:span></text:p>
        <text:p text:style-name="P11"><text:span text:style-name="Source_20_Text"><text:s text:c="6"/>this.shoot(scene);</text:span></text:p>
        <text:p text:style-name="P11"><text:soft-page-break/><text:span text:style-name="Source_20_Text"><text:s text:c="6"/>this.shootCooldown = 0.25;</text:span></text:p>
        <text:p text:style-name="P11"><text:span text:style-name="Source_20_Text"><text:s text:c="4"/>}</text:span></text:p>
        <text:p text:style-name="P11"><text:span text:style-name="Source_20_Text"><text:s text:c="4"/>for (const bullet of this.bullets) {</text:span></text:p>
        <text:p text:style-name="P11"><text:span text:style-name="Source_20_Text"><text:s text:c="6"/>bullet.update(delta);</text:span></text:p>
        <text:p text:style-name="P11"><text:span text:style-name="Source_20_Text"><text:s text:c="4"/>}</text:span></text:p>
        <text:p text:style-name="P11"><text:span text:style-name="Source_20_Text"><text:s text:c="2"/>}</text:span></text:p>
        <text:p text:style-name="P11"><text:span text:style-name="Source_20_Text"><text:s text:c="2"/>shoot(scene) {</text:span></text:p>
        <text:p text:style-name="P11"><text:span text:style-name="Source_20_Text"><text:s text:c="4"/>const direction = new THREE.Vector3(0, 0, -1);</text:span></text:p>
        <text:p text:style-name="P11"><text:span text:style-name="Source_20_Text"><text:s text:c="4"/>const bullet = new Bullet(</text:span></text:p>
        <text:p text:style-name="P11"><text:span text:style-name="Source_20_Text"><text:s text:c="6"/>this.mesh.position.clone(),</text:span></text:p>
        <text:p text:style-name="P11"><text:span text:style-name="Source_20_Text"><text:s text:c="6"/>direction</text:span></text:p>
        <text:p text:style-name="P11"><text:span text:style-name="Source_20_Text"><text:s text:c="4"/>);</text:span></text:p>
        <text:p text:style-name="P11"><text:span text:style-name="Source_20_Text"><text:s text:c="4"/>this.bullets.push(bullet);</text:span></text:p>
        <text:p text:style-name="P11"><text:span text:style-name="Source_20_Text"><text:s text:c="4"/>scene.add(bullet.mesh);</text:span></text:p>
        <text:p text:style-name="P11"><text:span text:style-name="Source_20_Text"><text:s text:c="2"/>}</text:span></text:p>
        <text:p text:style-name="P11"><text:span text:style-name="Source_20_Text">}</text:span></text:p>
        <text:p text:style-name="P11"/>
      </text:section>
      <text:p text:style-name="P10">8. core/Game.js</text:p>
      <text:p text:style-name="Quotations">This wires everything together.</text:p>
      <text:section text:style-name="Sect1" text:name="Section12">
        <text:p text:style-name="P11"><text:bookmark text:name="code-block-viewer Copy 11"/><text:span text:style-name="Source_20_Text">import * as THREE from 'three';</text:span></text:p>
        <text:p text:style-name="P11"><text:span text:style-name="Source_20_Text">import { Input } from './Input';</text:span></text:p>
        <text:p text:style-name="P11"><text:span text:style-name="Source_20_Text">import { Player } from '../entities/Player';</text:span></text:p>
        <text:p text:style-name="P11"><text:span text:style-name="Source_20_Text">export class Game {</text:span></text:p>
        <text:p text:style-name="P11"><text:span text:style-name="Source_20_Text"><text:s text:c="2"/>constructor() {</text:span></text:p>
        <text:p text:style-name="P11"><text:span text:style-name="Source_20_Text"><text:s text:c="4"/>this.scene = new THREE.Scene();</text:span></text:p>
        <text:p text:style-name="P11"><text:span text:style-name="Source_20_Text"><text:s text:c="4"/>this.camera = new THREE.OrthographicCamera(</text:span></text:p>
        <text:p text:style-name="P11"><text:span text:style-name="Source_20_Text"><text:s text:c="6"/>window.innerWidth / -50,</text:span></text:p>
        <text:p text:style-name="P11"><text:span text:style-name="Source_20_Text"><text:s text:c="6"/>window.innerWidth / 50,</text:span></text:p>
        <text:p text:style-name="P11"><text:span text:style-name="Source_20_Text"><text:s text:c="6"/>window.innerHeight / 50,</text:span></text:p>
        <text:p text:style-name="P11"><text:span text:style-name="Source_20_Text"><text:s text:c="6"/>window.innerHeight / -50,</text:span></text:p>
        <text:p text:style-name="P11"><text:span text:style-name="Source_20_Text"><text:s text:c="6"/>0.1,</text:span></text:p>
        <text:p text:style-name="P11"><text:span text:style-name="Source_20_Text"><text:s text:c="6"/>1000</text:span></text:p>
        <text:p text:style-name="P11"><text:span text:style-name="Source_20_Text"><text:s text:c="4"/>);</text:span></text:p>
        <text:p text:style-name="P11"><text:span text:style-name="Source_20_Text"><text:s text:c="4"/>this.camera.position.set(0, 20, 0);</text:span></text:p>
        <text:p text:style-name="P11"><text:span text:style-name="Source_20_Text"><text:s text:c="4"/>this.camera.lookAt(0, 0, 0);</text:span></text:p>
        <text:p text:style-name="P11"><text:span text:style-name="Source_20_Text"><text:s text:c="4"/>this.renderer = new THREE.WebGLRenderer({</text:span></text:p>
        <text:p text:style-name="P11"><text:span text:style-name="Source_20_Text"><text:s text:c="6"/>antialias: true,</text:span></text:p>
        <text:p text:style-name="P11"><text:span text:style-name="Source_20_Text"><text:s text:c="4"/>});</text:span></text:p>
        <text:p text:style-name="P11"><text:span text:style-name="Source_20_Text"><text:s text:c="4"/>this.renderer.setSize(</text:span></text:p>
        <text:p text:style-name="P11"><text:span text:style-name="Source_20_Text"><text:s text:c="6"/>window.innerWidth,</text:span></text:p>
        <text:p text:style-name="P11"><text:span text:style-name="Source_20_Text"><text:s text:c="6"/>window.innerHeight</text:span></text:p>
        <text:p text:style-name="P11"><text:span text:style-name="Source_20_Text"><text:s text:c="4"/>);</text:span></text:p>
        <text:p text:style-name="P11"><text:span text:style-name="Source_20_Text"><text:s text:c="4"/>document.body.appendChild(this.renderer.domElement);</text:span></text:p>
        <text:p text:style-name="P11"><text:span text:style-name="Source_20_Text"><text:s text:c="4"/>this.input = new Input();</text:span></text:p>
        <text:p text:style-name="P11"><text:span text:style-name="Source_20_Text"><text:s text:c="4"/>const light = new THREE.DirectionalLight(0xffffff, 1);</text:span></text:p>
        <text:p text:style-name="P11"><text:span text:style-name="Source_20_Text"><text:s text:c="4"/>light.position.set(10, 20, 10);</text:span></text:p>
        <text:p text:style-name="P11"><text:span text:style-name="Source_20_Text"><text:s text:c="4"/>this.scene.add(light);</text:span></text:p>
        <text:p text:style-name="P11"><text:span text:style-name="Source_20_Text"><text:s text:c="4"/>const floor = new THREE.Mesh(</text:span></text:p>
        <text:p text:style-name="P11"><text:span text:style-name="Source_20_Text"><text:s text:c="6"/>new THREE.PlaneGeometry(50, 50),</text:span></text:p>
        <text:p text:style-name="P11"><text:span text:style-name="Source_20_Text"><text:s text:c="6"/>new THREE.MeshPhongMaterial({</text:span></text:p>
        <text:p text:style-name="P11"><text:soft-page-break/><text:span text:style-name="Source_20_Text"><text:s text:c="8"/>color: 0x222222,</text:span></text:p>
        <text:p text:style-name="P11"><text:span text:style-name="Source_20_Text"><text:s text:c="6"/>})</text:span></text:p>
        <text:p text:style-name="P11"><text:span text:style-name="Source_20_Text"><text:s text:c="4"/>);</text:span></text:p>
        <text:p text:style-name="P11"><text:span text:style-name="Source_20_Text"><text:s text:c="4"/>floor.rotation.x = -Math.PI / 2;</text:span></text:p>
        <text:p text:style-name="P11"><text:span text:style-name="Source_20_Text"><text:s text:c="4"/>this.scene.add(floor);</text:span></text:p>
        <text:p text:style-name="P11"><text:span text:style-name="Source_20_Text"><text:s text:c="4"/>this.player1 = new Player(0x00ff00, {</text:span></text:p>
        <text:p text:style-name="P11"><text:span text:style-name="Source_20_Text"><text:s text:c="6"/>up: 'KeyW',</text:span></text:p>
        <text:p text:style-name="P11"><text:span text:style-name="Source_20_Text"><text:s text:c="6"/>down: 'KeyS',</text:span></text:p>
        <text:p text:style-name="P11"><text:span text:style-name="Source_20_Text"><text:s text:c="6"/>left: 'KeyA',</text:span></text:p>
        <text:p text:style-name="P11"><text:span text:style-name="Source_20_Text"><text:s text:c="6"/>right: 'KeyD',</text:span></text:p>
        <text:p text:style-name="P11"><text:span text:style-name="Source_20_Text"><text:s text:c="6"/>fire: 'Space',</text:span></text:p>
        <text:p text:style-name="P11"><text:span text:style-name="Source_20_Text"><text:s text:c="4"/>});</text:span></text:p>
        <text:p text:style-name="P11"><text:span text:style-name="Source_20_Text"><text:s text:c="4"/>this.player2 = new Player(0x00aaff, {</text:span></text:p>
        <text:p text:style-name="P11"><text:span text:style-name="Source_20_Text"><text:s text:c="6"/>up: 'ArrowUp',</text:span></text:p>
        <text:p text:style-name="P11"><text:span text:style-name="Source_20_Text"><text:s text:c="6"/>down: 'ArrowDown',</text:span></text:p>
        <text:p text:style-name="P11"><text:span text:style-name="Source_20_Text"><text:s text:c="6"/>left: 'ArrowLeft',</text:span></text:p>
        <text:p text:style-name="P11"><text:span text:style-name="Source_20_Text"><text:s text:c="6"/>right: 'ArrowRight',</text:span></text:p>
        <text:p text:style-name="P11"><text:span text:style-name="Source_20_Text"><text:s text:c="6"/>fire: 'Enter',</text:span></text:p>
        <text:p text:style-name="P11"><text:span text:style-name="Source_20_Text"><text:s text:c="4"/>});</text:span></text:p>
        <text:p text:style-name="P11"><text:span text:style-name="Source_20_Text"><text:s text:c="4"/>this.player2.mesh.position.x = 5;</text:span></text:p>
        <text:p text:style-name="P11"><text:span text:style-name="Source_20_Text"><text:s text:c="4"/>this.scene.add(this.player1.mesh);</text:span></text:p>
        <text:p text:style-name="P11"><text:span text:style-name="Source_20_Text"><text:s text:c="4"/>this.scene.add(this.player2.mesh);</text:span></text:p>
        <text:p text:style-name="P11"><text:span text:style-name="Source_20_Text"><text:s text:c="4"/>this.clock = new THREE.Clock();</text:span></text:p>
        <text:p text:style-name="P11"><text:span text:style-name="Source_20_Text"><text:s text:c="2"/>}</text:span></text:p>
        <text:p text:style-name="P11"><text:span text:style-name="Source_20_Text"><text:s text:c="2"/>start() {</text:span></text:p>
        <text:p text:style-name="P11"><text:span text:style-name="Source_20_Text"><text:s text:c="4"/>this.animate();</text:span></text:p>
        <text:p text:style-name="P11"><text:span text:style-name="Source_20_Text"><text:s text:c="2"/>}</text:span></text:p>
        <text:p text:style-name="P11"><text:span text:style-name="Source_20_Text"><text:s text:c="2"/>animate() {</text:span></text:p>
        <text:p text:style-name="P11"><text:span text:style-name="Source_20_Text"><text:s text:c="4"/>requestAnimationFrame(() =&gt; this.animate());</text:span></text:p>
        <text:p text:style-name="P11"><text:span text:style-name="Source_20_Text"><text:s text:c="4"/>const delta = this.clock.getDelta();</text:span></text:p>
        <text:p text:style-name="P11"><text:span text:style-name="Source_20_Text"><text:s text:c="4"/>this.player1.update(delta, this.input, this.scene);</text:span></text:p>
        <text:p text:style-name="P11"><text:span text:style-name="Source_20_Text"><text:s text:c="4"/>this.player2.update(delta, this.input, this.scene);</text:span></text:p>
        <text:p text:style-name="P11"><text:span text:style-name="Source_20_Text"><text:s text:c="4"/>this.renderer.render(this.scene, this.camera);</text:span></text:p>
        <text:p text:style-name="P11"><text:span text:style-name="Source_20_Text"><text:s text:c="2"/>}</text:span></text:p>
        <text:p text:style-name="P11"><text:span text:style-name="Source_20_Text">}</text:span></text:p>
        <text:p text:style-name="P11"><text:span text:style-name="Source_20_Text"/></text:p>
      </text:section>
      <text:p text:style-name="P10">What you’ll get</text:p>
      <text:p text:style-name="Quotations">Once running:</text:p>
      <text:list text:style-name="L15">
        <text:list-item>
          <text:p text:style-name="P31">2-player local movement </text:p>
        </text:list-item>
        <text:list-item>
          <text:p text:style-name="P31">Shooting </text:p>
        </text:list-item>
        <text:list-item>
          <text:p text:style-name="P31">Orthographic arcade camera </text:p>
        </text:list-item>
        <text:list-item>
          <text:p text:style-name="P31">Proper game loop </text:p>
        </text:list-item>
        <text:list-item>
          <text:p text:style-name="P31">A clean structure you can extend </text:p>
          <text:p text:style-name="P31"/>
        </text:list-item>
      </text:list>
      <text:p text:style-name="Quotations">It won’t look impressive yet — but architecturally it’s the important first step.</text:p>
      <text:p text:style-name="P10"/>
      <text:p text:style-name="P10"/>
      <text:p text:style-name="P10"><text:soft-page-break/>Your next upgrade path</text:p>
      <text:p text:style-name="Quotations">After this, I’d recommend this exact order:</text:p>
      <text:p text:style-name="P10">Phase 1</text:p>
      <text:list text:style-name="L16">
        <text:list-item>
          <text:p text:style-name="P32">Rotate players toward movement </text:p>
        </text:list-item>
        <text:list-item>
          <text:p text:style-name="P32">Bullet cleanup </text:p>
        </text:list-item>
        <text:list-item>
          <text:p text:style-name="P32">Enemy spawning </text:p>
        </text:list-item>
        <text:list-item>
          <text:p text:style-name="P32">Collision detection </text:p>
          <text:p text:style-name="P32"/>
        </text:list-item>
      </text:list>
      <text:p text:style-name="P10">Phase 2</text:p>
      <text:list text:style-name="L17">
        <text:list-item>
          <text:p text:style-name="P33">Sprite art or low-poly models </text:p>
        </text:list-item>
        <text:list-item>
          <text:p text:style-name="P33">Explosions </text:p>
        </text:list-item>
        <text:list-item>
          <text:p text:style-name="P33">Sound effects </text:p>
        </text:list-item>
        <text:list-item>
          <text:p text:style-name="P33">Bomb mechanic </text:p>
          <text:p text:style-name="P33"/>
        </text:list-item>
      </text:list>
      <text:p text:style-name="P10">Phase 3</text:p>
      <text:list text:style-name="L18">
        <text:list-item>
          <text:p text:style-name="P34">Tile-based maps </text:p>
        </text:list-item>
        <text:list-item>
          <text:p text:style-name="P34">Doors/objectives </text:p>
        </text:list-item>
        <text:list-item>
          <text:p text:style-name="P34">Wave progression </text:p>
        </text:list-item>
        <text:list-item>
          <text:p text:style-name="P34">UI/HUD </text:p>
          <text:p text:style-name="P34"/>
        </text:list-item>
      </text:list>
      <text:p text:style-name="P10">Phase 4</text:p>
      <text:list text:style-name="L19">
        <text:list-item>
          <text:p text:style-name="P35">Gamepad support </text:p>
        </text:list-item>
        <text:list-item>
          <text:p text:style-name="P35">Menu system </text:p>
        </text:list-item>
        <text:list-item>
          <text:p text:style-name="P35">Online co-op (optional) </text:p>
          <text:p text:style-name="P35"/>
        </text:list-item>
      </text:list>
      <text:p text:style-name="P10">Useful official resources</text:p>
      <text:list text:style-name="L20">
        <text:list-item>
          <text:p text:style-name="P36"><text:a xlink:type="simple" xlink:href="https://threejs.org/?utm_source=chatgpt.com" office:target-frame-name="_blank" xlink:show="new" text:style-name="Internet_20_link" text:visited-style-name="Visited_20_Internet_20_Link">Three.js Official Site</text:a> </text:p>
        </text:list-item>
        <text:list-item>
          <text:p text:style-name="P36"><text:a xlink:type="simple" xlink:href="https://threejs.org/examples/?utm_source=chatgpt.com" office:target-frame-name="_blank" xlink:show="new" text:style-name="Internet_20_link" text:visited-style-name="Visited_20_Internet_20_Link">Three.js Examples</text:a> </text:p>
        </text:list-item>
        <text:list-item>
          <text:p text:style-name="P36"><text:a xlink:type="simple" xlink:href="https://vitejs.dev/?utm_source=chatgpt.com" office:target-frame-name="_blank" xlink:show="new" text:style-name="Internet_20_link" text:visited-style-name="Visited_20_Internet_20_Link">Vite Documentation</text:a> </text:p>
        </text:list-item>
        <text:list-item>
          <text:p text:style-name="P36"><text:a xlink:type="simple" xlink:href="https://developer.mozilla.org/en-US/docs/Web/API/Gamepad_API?utm_source=chatgpt.com" office:target-frame-name="_blank" xlink:show="new" text:style-name="Internet_20_link" text:visited-style-name="Visited_20_Internet_20_Link">MDN Gamepad API Docs</text:a> </text:p>
          <text:p text:style-name="P36"/>
        </text:list-item>
      </text:list>
      <text:p text:style-name="Quotations">You’re actually in a very good spot for this kind of project because the scope can stay intentionally arcade-sized. That’s exactly where solo game projects have the best chance of becoming real.</text:p>
      <text:p text:style-name="P37">So, with those suggestions, I set forth and created the first version of the game which produced some very basic display and controls but delivered exactly as advertised – perfectly ready to expand on in an easy to understand structure. <text:span text:style-name="T4">The game runs in a browser and featured two (keyboard) controllable players </text:span><text:span text:style-name="T5">(as non-rotatable blocks)</text:span><text:span text:style-name="T4"> with a single direction of shooting.</text:span></text:p>
      <text:p text:style-name="P37"><text:soft-page-break/><text:span text:style-name="T6">ChatGPT </text:span><text:span text:style-name="T7">had these recommendations as to next steps for Phase 1:</text:span></text:p>
      <text:list text:style-name="L21">
        <text:list-item>
          <text:p text:style-name="P38">Rotate players toward movement</text:p>
        </text:list-item>
        <text:list-item>
          <text:p text:style-name="P38">Bullet cleanup</text:p>
        </text:list-item>
        <text:list-item>
          <text:p text:style-name="P38">Enemy spawning</text:p>
        </text:list-item>
        <text:list-item>
          <text:p text:style-name="P38">Collision detection </text:p>
          <text:p text:style-name="P38"/>
        </text:list-item>
      </text:list>
      <text:p text:style-name="P39">My <text:span text:style-name="T7">initial work on this directive</text:span> was to:</text:p>
      <text:list text:style-name="L22">
        <text:list-item>
          <text:p text:style-name="P40">Make the blocks support basic rotation by rendering them a 45 degree angles when both horizontal and vertical movement was occurring</text:p>
        </text:list-item>
        <text:list-item>
          <text:p text:style-name="P40">Determine the direction the player was facing so that the bullets could be shot in eight different directions</text:p>
        </text:list-item>
        <text:list-item>
          <text:p text:style-name="P40">Create a lifetime for the shot bullet so that it would only travel a certain distance before expiry (and also removing the bullet instance from the game)</text:p>
        </text:list-item>
        <text:list-item>
          <text:p text:style-name="P41">Added a simple animation to the bullet on its destruction</text:p>
        </text:list-item>
        <text:list-item>
          <text:p text:style-name="P40">Enable players and bullets to cast shadows and for the floor to receive shadows</text:p>
        </text:list-item>
      </text:list>
      <text:p text:style-name="P42"/>
      <text:p text:style-name="P43">I wasn’t too sure where to start with the enemy units, in the past I’d re-used some player code and added in artificial path-finding and movement prompters. So, as is my want, off to ask another question:</text:p>
      <text:p text:style-name="P43"/>
      <text:p text:style-name="P2">From the phase 1 to do list, could I get a hand with the enemy spawning step, I assume this would also include automated movement and in the future awareness of obstacles? </text:p>
      <text:p text:style-name="Quotations">Yes — and this is exactly the right next step.</text:p>
      <text:p text:style-name="Quotations">What you’re really building now is your first <text:span text:style-name="Strong_20_Emphasis">gameplay system</text:span>:</text:p>
      <text:list text:style-name="L23">
        <text:list-item>
          <text:p text:style-name="P44">enemy spawning </text:p>
        </text:list-item>
        <text:list-item>
          <text:p text:style-name="P44">enemy lifecycle </text:p>
        </text:list-item>
        <text:list-item>
          <text:p text:style-name="P44">movement AI </text:p>
        </text:list-item>
        <text:list-item>
          <text:p text:style-name="P44">targeting </text:p>
        </text:list-item>
        <text:list-item>
          <text:p text:style-name="P44">collision preparation </text:p>
        </text:list-item>
        <text:list-item>
          <text:p text:style-name="P44">eventually pathfinding / obstacle avoidance </text:p>
          <text:p text:style-name="P44"/>
        </text:list-item>
      </text:list>
      <text:p text:style-name="Quotations">The good news is: you do <text:span text:style-name="Strong_20_Emphasis">not</text:span> need “real AI” yet.</text:p>
      <text:p text:style-name="Quotations">For a Crackdown-style prototype, the classic formula is:</text:p>
      <text:p text:style-name="Quotations">“Enemies continuously move toward the nearest player.”</text:p>
      <text:p text:style-name="Quotations">That alone already feels like a game.</text:p>
      <text:p text:style-name="P10"/>
      <text:p text:style-name="P10"><text:soft-page-break/>Recommended approach</text:p>
      <text:p text:style-name="Quotations">Keep it simple initially:</text:p>
      <text:p text:style-name="P10">Version 1 (now)</text:p>
      <text:list text:style-name="L24">
        <text:list-item>
          <text:p text:style-name="P45">Spawn enemies at map edges </text:p>
        </text:list-item>
        <text:list-item>
          <text:p text:style-name="P45">Move directly toward nearest player </text:p>
        </text:list-item>
        <text:list-item>
          <text:p text:style-name="P45">Destroy when hit </text:p>
        </text:list-item>
      </text:list>
      <text:p text:style-name="P10">Version 2</text:p>
      <text:list text:style-name="L25">
        <text:list-item>
          <text:p text:style-name="P46">Avoid overlapping </text:p>
        </text:list-item>
        <text:list-item>
          <text:p text:style-name="P46">Simple steering around walls </text:p>
          <text:p text:style-name="P46"/>
        </text:list-item>
      </text:list>
      <text:p text:style-name="P10">Version 3</text:p>
      <text:list text:style-name="L26">
        <text:list-item>
          <text:p text:style-name="P47">Proper pathfinding/navmesh </text:p>
        </text:list-item>
      </text:list>
      <text:p text:style-name="P48">Don’t jump to Version 3 yet.</text:p>
      <text:p text:style-name="P49">New structure</text:p>
      <text:p text:style-name="P48">Add:</text:p>
      <text:section text:style-name="Sect1" text:name="Section13">
        <text:p text:style-name="P11"><text:bookmark text:name="code-block-viewer Copy 20"/><text:span text:style-name="Source_20_Text">/entities</text:span></text:p>
        <text:p text:style-name="P11"><text:span text:style-name="Source_20_Text"><text:s text:c="2"/>Enemy.js</text:span></text:p>
        <text:p text:style-name="P11"><text:span text:style-name="Source_20_Text">/systems</text:span></text:p>
        <text:p text:style-name="P11"><text:span text:style-name="Source_20_Text"><text:s text:c="2"/>EnemySpawner.js</text:span></text:p>
        <text:p text:style-name="P50"/>
      </text:section>
      <text:p text:style-name="P10">1. Enemy.js</text:p>
      <text:p text:style-name="Quotations">Create:</text:p>
      <text:section text:style-name="Sect1" text:name="Section14">
        <text:p text:style-name="P11"><text:bookmark text:name="code-block-viewer Copy 21"/><text:span text:style-name="Source_20_Text">import * as THREE from 'three';</text:span></text:p>
        <text:p text:style-name="P11"><text:span text:style-name="Source_20_Text">export class Enemy {</text:span></text:p>
        <text:p text:style-name="P11"><text:span text:style-name="Source_20_Text"><text:s text:c="2"/>constructor(players) {</text:span></text:p>
        <text:p text:style-name="P11"><text:span text:style-name="Source_20_Text"><text:s text:c="4"/>this.players = players;</text:span></text:p>
        <text:p text:style-name="P11"><text:span text:style-name="Source_20_Text"><text:s text:c="4"/>const geometry = new THREE.BoxGeometry(1, 1, 1);</text:span></text:p>
        <text:p text:style-name="P11"><text:span text:style-name="Source_20_Text"><text:s text:c="4"/>const material = new THREE.MeshPhongMaterial({</text:span></text:p>
        <text:p text:style-name="P11"><text:span text:style-name="Source_20_Text"><text:s text:c="6"/>color: 0xff3333,</text:span></text:p>
        <text:p text:style-name="P11"><text:span text:style-name="Source_20_Text"><text:s text:c="4"/>});</text:span></text:p>
        <text:p text:style-name="P11"><text:span text:style-name="Source_20_Text"><text:s text:c="4"/>this.mesh = new THREE.Mesh(geometry, material);</text:span></text:p>
        <text:p text:style-name="P11"><text:span text:style-name="Source_20_Text"><text:s text:c="4"/>this.speed = 2;</text:span></text:p>
        <text:p text:style-name="P11"><text:span text:style-name="Source_20_Text"><text:s text:c="2"/>}</text:span></text:p>
        <text:p text:style-name="P11"><text:span text:style-name="Source_20_Text"><text:s text:c="2"/>update(delta) {</text:span></text:p>
        <text:p text:style-name="P11"><text:span text:style-name="Source_20_Text"><text:s text:c="4"/>const target = this.getNearestPlayer();</text:span></text:p>
        <text:p text:style-name="P11"><text:span text:style-name="Source_20_Text"><text:s text:c="4"/>if (!target) return;</text:span></text:p>
        <text:p text:style-name="P11"><text:span text:style-name="Source_20_Text"><text:s text:c="4"/>const direction = new THREE.Vector3()</text:span></text:p>
        <text:p text:style-name="P11"><text:span text:style-name="Source_20_Text"><text:s text:c="6"/>.subVectors(</text:span></text:p>
        <text:p text:style-name="P11"><text:soft-page-break/><text:span text:style-name="Source_20_Text"><text:s text:c="8"/>target.mesh.position,</text:span></text:p>
        <text:p text:style-name="P11"><text:span text:style-name="Source_20_Text"><text:s text:c="8"/>this.mesh.position</text:span></text:p>
        <text:p text:style-name="P11"><text:span text:style-name="Source_20_Text"><text:s text:c="6"/>)</text:span></text:p>
        <text:p text:style-name="P11"><text:span text:style-name="Source_20_Text"><text:s text:c="6"/>.normalize();</text:span></text:p>
        <text:p text:style-name="P11"><text:span text:style-name="Source_20_Text"><text:s text:c="4"/>this.mesh.position.add(</text:span></text:p>
        <text:p text:style-name="P11"><text:span text:style-name="Source_20_Text"><text:s text:c="6"/>direction.multiplyScalar(this.speed * delta)</text:span></text:p>
        <text:p text:style-name="P11"><text:span text:style-name="Source_20_Text"><text:s text:c="4"/>);</text:span></text:p>
        <text:p text:style-name="P11"><text:span text:style-name="Source_20_Text"><text:s text:c="2"/>}</text:span></text:p>
        <text:p text:style-name="P11"><text:span text:style-name="Source_20_Text"><text:s text:c="2"/>getNearestPlayer() {</text:span></text:p>
        <text:p text:style-name="P11"><text:span text:style-name="Source_20_Text"><text:s text:c="4"/>let nearest = null;</text:span></text:p>
        <text:p text:style-name="P11"><text:span text:style-name="Source_20_Text"><text:s text:c="4"/>let nearestDistance = Infinity;</text:span></text:p>
        <text:p text:style-name="P11"><text:span text:style-name="Source_20_Text"><text:s text:c="4"/>for (const player of this.players) {</text:span></text:p>
        <text:p text:style-name="P11"><text:span text:style-name="Source_20_Text"><text:s text:c="6"/>const distance =</text:span></text:p>
        <text:p text:style-name="P11"><text:span text:style-name="Source_20_Text"><text:s text:c="8"/>this.mesh.position.distanceTo(</text:span></text:p>
        <text:p text:style-name="P11"><text:span text:style-name="Source_20_Text"><text:s text:c="10"/>player.mesh.position</text:span></text:p>
        <text:p text:style-name="P11"><text:span text:style-name="Source_20_Text"><text:s text:c="8"/>);</text:span></text:p>
        <text:p text:style-name="P11"><text:span text:style-name="Source_20_Text"><text:s text:c="6"/>if (distance &lt; nearestDistance) {</text:span></text:p>
        <text:p text:style-name="P11"><text:span text:style-name="Source_20_Text"><text:s text:c="8"/>nearestDistance = distance;</text:span></text:p>
        <text:p text:style-name="P11"><text:span text:style-name="Source_20_Text"><text:s text:c="8"/>nearest = player;</text:span></text:p>
        <text:p text:style-name="P11"><text:span text:style-name="Source_20_Text"><text:s text:c="6"/>}</text:span></text:p>
        <text:p text:style-name="P11"><text:span text:style-name="Source_20_Text"><text:s text:c="4"/>}</text:span></text:p>
        <text:p text:style-name="P11"><text:span text:style-name="Source_20_Text"><text:s text:c="4"/>return nearest;</text:span></text:p>
        <text:p text:style-name="P11"><text:span text:style-name="Source_20_Text"><text:s text:c="2"/>}</text:span></text:p>
        <text:p text:style-name="P11"><text:span text:style-name="Source_20_Text">}</text:span></text:p>
        <text:p text:style-name="P51"/>
      </text:section>
      <text:p text:style-name="P10">2. systems/EnemySpawner.js</text:p>
      <text:section text:style-name="Sect1" text:name="Section15">
        <text:p text:style-name="P11"><text:bookmark text:name="code-block-viewer Copy 22"/><text:span text:style-name="Source_20_Text">import { Enemy } from '../entities/Enemy';</text:span></text:p>
        <text:p text:style-name="P11"><text:span text:style-name="Source_20_Text">export class EnemySpawner {</text:span></text:p>
        <text:p text:style-name="P11"><text:span text:style-name="Source_20_Text"><text:s text:c="2"/>constructor(scene, players) {</text:span></text:p>
        <text:p text:style-name="P11"><text:span text:style-name="Source_20_Text"><text:s text:c="4"/>this.scene = scene;</text:span></text:p>
        <text:p text:style-name="P11"><text:span text:style-name="Source_20_Text"><text:s text:c="4"/>this.players = players;</text:span></text:p>
        <text:p text:style-name="P11"><text:span text:style-name="Source_20_Text"><text:s text:c="4"/>this.enemies = [];</text:span></text:p>
        <text:p text:style-name="P11"><text:span text:style-name="Source_20_Text"><text:s text:c="4"/>this.spawnTimer = 0;</text:span></text:p>
        <text:p text:style-name="P11"><text:span text:style-name="Source_20_Text"><text:s text:c="4"/>this.spawnInterval = 2;</text:span></text:p>
        <text:p text:style-name="P11"><text:span text:style-name="Source_20_Text"><text:s text:c="2"/>}</text:span></text:p>
        <text:p text:style-name="P11"><text:span text:style-name="Source_20_Text"><text:s text:c="2"/>update(delta) {</text:span></text:p>
        <text:p text:style-name="P11"><text:span text:style-name="Source_20_Text"><text:s text:c="4"/>this.spawnTimer -= delta;</text:span></text:p>
        <text:p text:style-name="P11"><text:span text:style-name="Source_20_Text"><text:s text:c="4"/>if (this.spawnTimer &lt;= 0) {</text:span></text:p>
        <text:p text:style-name="P11"><text:span text:style-name="Source_20_Text"><text:s text:c="6"/>this.spawnEnemy();</text:span></text:p>
        <text:p text:style-name="P11"><text:span text:style-name="Source_20_Text"><text:s text:c="6"/>this.spawnTimer = this.spawnInterval;</text:span></text:p>
        <text:p text:style-name="P11"><text:span text:style-name="Source_20_Text"><text:s text:c="4"/>}</text:span></text:p>
        <text:p text:style-name="P11"><text:span text:style-name="Source_20_Text"><text:s text:c="4"/>for (const enemy of this.enemies) {</text:span></text:p>
        <text:p text:style-name="P11"><text:span text:style-name="Source_20_Text"><text:s text:c="6"/>enemy.update(delta);</text:span></text:p>
        <text:p text:style-name="P11"><text:span text:style-name="Source_20_Text"><text:s text:c="4"/>}</text:span></text:p>
        <text:p text:style-name="P11"><text:span text:style-name="Source_20_Text"><text:s text:c="2"/>}</text:span></text:p>
        <text:p text:style-name="P11"><text:span text:style-name="Source_20_Text"><text:s text:c="2"/>spawnEnemy() {</text:span></text:p>
        <text:p text:style-name="P11"><text:span text:style-name="Source_20_Text"><text:s text:c="4"/>const enemy = new Enemy(this.players);</text:span></text:p>
        <text:p text:style-name="P11"><text:span text:style-name="Source_20_Text"><text:s text:c="4"/>const edge = Math.floor(Math.random() * 4);</text:span></text:p>
        <text:p text:style-name="P11"><text:span text:style-name="Source_20_Text"><text:s text:c="4"/>const range = 20;</text:span></text:p>
        <text:p text:style-name="P11"><text:span text:style-name="Source_20_Text"><text:s text:c="4"/>switch (edge) {</text:span></text:p>
        <text:p text:style-name="P11"><text:span text:style-name="Source_20_Text"><text:s text:c="6"/>case 0:</text:span></text:p>
        <text:p text:style-name="P11"><text:soft-page-break/><text:span text:style-name="Source_20_Text"><text:s text:c="8"/>enemy.mesh.position.set(</text:span></text:p>
        <text:p text:style-name="P11"><text:span text:style-name="Source_20_Text"><text:s text:c="10"/>-range,</text:span></text:p>
        <text:p text:style-name="P11"><text:span text:style-name="Source_20_Text"><text:s text:c="10"/>0.5,</text:span></text:p>
        <text:p text:style-name="P11"><text:span text:style-name="Source_20_Text"><text:s text:c="10"/>Math.random() * range * 2 - range</text:span></text:p>
        <text:p text:style-name="P11"><text:span text:style-name="Source_20_Text"><text:s text:c="8"/>);</text:span></text:p>
        <text:p text:style-name="P11"><text:span text:style-name="Source_20_Text"><text:s text:c="8"/>break;</text:span></text:p>
        <text:p text:style-name="P11"><text:span text:style-name="Source_20_Text"><text:s text:c="6"/>case 1:</text:span></text:p>
        <text:p text:style-name="P11"><text:span text:style-name="Source_20_Text"><text:s text:c="8"/>enemy.mesh.position.set(</text:span></text:p>
        <text:p text:style-name="P11"><text:span text:style-name="Source_20_Text"><text:s text:c="10"/>range,</text:span></text:p>
        <text:p text:style-name="P11"><text:span text:style-name="Source_20_Text"><text:s text:c="10"/>0.5,</text:span></text:p>
        <text:p text:style-name="P11"><text:span text:style-name="Source_20_Text"><text:s text:c="10"/>Math.random() * range * 2 - range</text:span></text:p>
        <text:p text:style-name="P11"><text:span text:style-name="Source_20_Text"><text:s text:c="8"/>);</text:span></text:p>
        <text:p text:style-name="P11"><text:span text:style-name="Source_20_Text"><text:s text:c="8"/>break;</text:span></text:p>
        <text:p text:style-name="P11"><text:span text:style-name="Source_20_Text"><text:s text:c="6"/>case 2:</text:span></text:p>
        <text:p text:style-name="P11"><text:span text:style-name="Source_20_Text"><text:s text:c="8"/>enemy.mesh.position.set(</text:span></text:p>
        <text:p text:style-name="P11"><text:span text:style-name="Source_20_Text"><text:s text:c="10"/>Math.random() * range * 2 - range,</text:span></text:p>
        <text:p text:style-name="P11"><text:span text:style-name="Source_20_Text"><text:s text:c="10"/>0.5,</text:span></text:p>
        <text:p text:style-name="P11"><text:span text:style-name="Source_20_Text"><text:s text:c="10"/>-range</text:span></text:p>
        <text:p text:style-name="P11"><text:span text:style-name="Source_20_Text"><text:s text:c="8"/>);</text:span></text:p>
        <text:p text:style-name="P11"><text:span text:style-name="Source_20_Text"><text:s text:c="8"/>break;</text:span></text:p>
        <text:p text:style-name="P11"><text:span text:style-name="Source_20_Text"><text:s text:c="6"/>case 3:</text:span></text:p>
        <text:p text:style-name="P11"><text:span text:style-name="Source_20_Text"><text:s text:c="8"/>enemy.mesh.position.set(</text:span></text:p>
        <text:p text:style-name="P11"><text:span text:style-name="Source_20_Text"><text:s text:c="10"/>Math.random() * range * 2 - range,</text:span></text:p>
        <text:p text:style-name="P11"><text:span text:style-name="Source_20_Text"><text:s text:c="10"/>0.5,</text:span></text:p>
        <text:p text:style-name="P11"><text:span text:style-name="Source_20_Text"><text:s text:c="10"/>range</text:span></text:p>
        <text:p text:style-name="P11"><text:span text:style-name="Source_20_Text"><text:s text:c="8"/>);</text:span></text:p>
        <text:p text:style-name="P11"><text:span text:style-name="Source_20_Text"><text:s text:c="8"/>break;</text:span></text:p>
        <text:p text:style-name="P11"><text:span text:style-name="Source_20_Text"><text:s text:c="4"/>}</text:span></text:p>
        <text:p text:style-name="P11"><text:span text:style-name="Source_20_Text"><text:s text:c="4"/>this.scene.add(enemy.mesh);</text:span></text:p>
        <text:p text:style-name="P11"><text:span text:style-name="Source_20_Text"><text:s text:c="4"/>this.enemies.push(enemy);</text:span></text:p>
        <text:p text:style-name="P11"><text:span text:style-name="Source_20_Text"><text:s text:c="2"/>}</text:span></text:p>
        <text:p text:style-name="P11"><text:span text:style-name="Source_20_Text">}</text:span></text:p>
        <text:p text:style-name="P50"/>
      </text:section>
      <text:p text:style-name="P10">3. Update Game.js</text:p>
      <text:p text:style-name="Quotations">Add import:</text:p>
      <text:section text:style-name="Sect1" text:name="Section16">
        <text:p text:style-name="P48"><text:bookmark text:name="code-block-viewer Copy 23"/><text:span text:style-name="Source_20_Text">import { EnemySpawner } from '../systems/EnemySpawner';</text:span></text:p>
      </text:section>
      <text:p text:style-name="Quotations">After creating players:</text:p>
      <text:section text:style-name="Sect1" text:name="Section17">
        <text:p text:style-name="P11"><text:bookmark text:name="code-block-viewer Copy 24"/><text:span text:style-name="Source_20_Text">this.enemySpawner = new EnemySpawner(</text:span></text:p>
        <text:p text:style-name="P11"><text:span text:style-name="Source_20_Text"><text:s text:c="2"/>this.scene,</text:span></text:p>
        <text:p text:style-name="P11"><text:span text:style-name="Source_20_Text"><text:s text:c="2"/>[this.player1, this.player2]</text:span></text:p>
        <text:p text:style-name="P11"><text:span text:style-name="Source_20_Text">);</text:span></text:p>
        <text:p text:style-name="P11"><text:span text:style-name="Source_20_Text"/></text:p>
      </text:section>
      <text:p text:style-name="Quotations">Inside <text:span text:style-name="Source_20_Text"><text:span text:style-name="T8">animate()</text:span></text:span>:</text:p>
      <text:section text:style-name="Sect1" text:name="Section18">
        <text:p text:style-name="Quotations"><text:bookmark text:name="code-block-viewer Copy 25"/><text:span text:style-name="Source_20_Text">this.enemySpawner.update(delta);</text:span></text:p>
      </text:section>
      <text:p text:style-name="P10"/>
      <text:p text:style-name="P10"><text:soft-page-break/>What happens now</text:p>
      <text:p text:style-name="Quotations">You’ll immediately get:</text:p>
      <text:list text:style-name="L27">
        <text:list-item>
          <text:p text:style-name="P52">enemies spawning around the map </text:p>
        </text:list-item>
        <text:list-item>
          <text:p text:style-name="P52">enemies choosing nearest player </text:p>
        </text:list-item>
        <text:list-item>
          <text:p text:style-name="P52">autonomous movement </text:p>
        </text:list-item>
        <text:list-item>
          <text:p text:style-name="P52">pressure gameplay </text:p>
          <text:p text:style-name="P52"/>
        </text:list-item>
      </text:list>
      <text:p text:style-name="Quotations">That’s the moment it starts feeling like an actual arcade game.</text:p>
      <text:p text:style-name="P10">Next important improvement: enemy separation</text:p>
      <text:p text:style-name="Quotations">Without this, enemies stack into one blob.</text:p>
      <text:p text:style-name="Quotations">Add this later:</text:p>
      <text:section text:style-name="Sect1" text:name="Section19">
        <text:p text:style-name="P11"><text:bookmark text:name="code-block-viewer Copy 26"/><text:span text:style-name="Source_20_Text">for (const other of enemies) {</text:span></text:p>
        <text:p text:style-name="P11"><text:span text:style-name="Source_20_Text"><text:s text:c="2"/>if (other === this) continue;</text:span></text:p>
        <text:p text:style-name="P11"><text:span text:style-name="Source_20_Text"><text:s text:c="2"/>const distance = this.mesh.position.distanceTo(</text:span></text:p>
        <text:p text:style-name="P11"><text:span text:style-name="Source_20_Text"><text:s text:c="4"/>other.mesh.position</text:span></text:p>
        <text:p text:style-name="P11"><text:span text:style-name="Source_20_Text"><text:s text:c="2"/>);</text:span></text:p>
        <text:p text:style-name="P11"><text:span text:style-name="Source_20_Text"><text:s text:c="2"/>if (distance &lt; 1.5) {</text:span></text:p>
        <text:p text:style-name="P11"><text:span text:style-name="Source_20_Text"><text:s text:c="4"/>// push apart</text:span></text:p>
        <text:p text:style-name="P11"><text:span text:style-name="Source_20_Text"><text:s text:c="2"/>}</text:span></text:p>
        <text:p text:style-name="P11"><text:span text:style-name="Source_20_Text">}</text:span></text:p>
        <text:p text:style-name="P11"><text:span text:style-name="Source_20_Text"/></text:p>
      </text:section>
      <text:p text:style-name="Quotations">This tiny change massively improves game feel.</text:p>
      <text:p text:style-name="P10">Obstacle awareness (future)</text:p>
      <text:p text:style-name="Quotations">You’re already thinking correctly.</text:p>
      <text:p text:style-name="Quotations">There are three levels:</text:p>
      <text:p text:style-name="P10">Level 1 — Steering (recommended first)</text:p>
      <text:p text:style-name="Quotations">Enemies:</text:p>
      <text:list text:style-name="L28">
        <text:list-item>
          <text:p text:style-name="P53">move toward player </text:p>
        </text:list-item>
        <text:list-item>
          <text:p text:style-name="P53">slightly repel from walls </text:p>
          <text:p text:style-name="P53"/>
        </text:list-item>
      </text:list>
      <text:p text:style-name="Quotations">Cheap and arcade-perfect.</text:p>
      <text:p text:style-name="P10">Level 2 — Grid pathfinding</text:p>
      <text:p text:style-name="Quotations">Use:</text:p>
      <text:list text:style-name="L29">
        <text:list-item>
          <text:p text:style-name="P54">A* </text:p>
        </text:list-item>
        <text:list-item>
          <text:p text:style-name="P54"><text:soft-page-break/>tile map </text:p>
        </text:list-item>
        <text:list-item>
          <text:p text:style-name="P54">occupancy grid </text:p>
          <text:p text:style-name="P54"/>
        </text:list-item>
      </text:list>
      <text:p text:style-name="Quotations">Good for indoor maps.</text:p>
      <text:p text:style-name="P10">Level 3 — NavMesh</text:p>
      <text:p text:style-name="Quotations">Use:</text:p>
      <text:list text:style-name="L30">
        <text:list-item>
          <text:p text:style-name="P55">navigation mesh </text:p>
        </text:list-item>
        <text:list-item>
          <text:p text:style-name="P55">funnel algorithms </text:p>
          <text:p text:style-name="P55"/>
        </text:list-item>
      </text:list>
      <text:p text:style-name="Quotations">This is what modern 3D games use.</text:p>
      <text:p text:style-name="Quotations">Overkill for now.</text:p>
      <text:p text:style-name="P10">My recommendation for YOUR game</text:p>
      <text:p text:style-name="Quotations">Because you’re doing a spiritual successor to an arcade shooter:</text:p>
      <text:p text:style-name="Quotations">Use:</text:p>
      <text:list text:style-name="L31">
        <text:list-item>
          <text:p text:style-name="P56">simple steering </text:p>
        </text:list-item>
        <text:list-item>
          <text:p text:style-name="P56">collision volumes </text:p>
        </text:list-item>
        <text:list-item>
          <text:p text:style-name="P56">lightweight AI </text:p>
          <text:p text:style-name="P56"/>
        </text:list-item>
      </text:list>
      <text:p text:style-name="Quotations">Avoid:</text:p>
      <text:list text:style-name="L32">
        <text:list-item>
          <text:p text:style-name="P57">heavy physics </text:p>
        </text:list-item>
        <text:list-item>
          <text:p text:style-name="P57">realistic movement </text:p>
        </text:list-item>
        <text:list-item>
          <text:p text:style-name="P57">complex pathfinding </text:p>
          <text:p text:style-name="P57"/>
        </text:list-item>
      </text:list>
      <text:p text:style-name="Quotations">The arcade feel actually benefits from simpler AI.</text:p>
      <text:p text:style-name="P10">One system you should add soon</text:p>
      <text:p text:style-name="Quotations">A shared base entity class.</text:p>
      <text:p text:style-name="Quotations">Eventually you’ll want:</text:p>
      <text:section text:style-name="Sect1" text:name="Section20">
        <text:p text:style-name="P11"><text:bookmark text:name="code-block-viewer Copy 27"/><text:span text:style-name="Source_20_Text">Entity</text:span></text:p>
        <text:p text:style-name="P11"><text:span text:style-name="Source_20_Text"><text:s/>├── Player</text:span></text:p>
        <text:p text:style-name="P11"><text:span text:style-name="Source_20_Text"><text:s/>├── Enemy</text:span></text:p>
        <text:p text:style-name="P11"><text:span text:style-name="Source_20_Text"><text:s/>├── Bullet</text:span></text:p>
        <text:p text:style-name="P11"><text:span text:style-name="Source_20_Text"/></text:p>
      </text:section>
      <text:p text:style-name="Quotations">because:</text:p>
      <text:list text:style-name="L33">
        <text:list-item>
          <text:p text:style-name="P58">health </text:p>
        </text:list-item>
        <text:list-item>
          <text:p text:style-name="P58">collision </text:p>
        </text:list-item>
        <text:list-item>
          <text:p text:style-name="P58"><text:soft-page-break/>update() </text:p>
        </text:list-item>
        <text:list-item>
          <text:p text:style-name="P58">destroy() </text:p>
          <text:p text:style-name="P58"/>
        </text:list-item>
      </text:list>
      <text:p text:style-name="Quotations">…will all repeat otherwise.</text:p>
      <text:p text:style-name="Quotations">But don’t refactor too early.</text:p>
      <text:p text:style-name="P10">Next excellent milestone</text:p>
      <text:p text:style-name="Quotations">Your next “this feels real” milestone is:</text:p>
      <text:p text:style-name="Quotations">Enemies can:</text:p>
      <text:list text:style-name="L34">
        <text:list-item>
          <text:p text:style-name="P59">chase </text:p>
        </text:list-item>
        <text:list-item>
          <text:p text:style-name="P59">collide </text:p>
        </text:list-item>
        <text:list-item>
          <text:p text:style-name="P59">die </text:p>
        </text:list-item>
        <text:list-item>
          <text:p text:style-name="P59">explode </text:p>
        </text:list-item>
        <text:list-item>
          <text:p text:style-name="P59">damage players</text:p>
          <text:p text:style-name="P60"/>
        </text:list-item>
      </text:list>
      <text:p text:style-name="Quotations">Once that loop exists, you’ve crossed from “graphics prototype” into “g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cm"/>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11:22:19.701977000</meta:creation-date>
    <dc:date>2026-06-15T10:29:25.509965900</dc:date>
    <meta:editing-duration>PT1H7M6S</meta:editing-duration>
    <meta:editing-cycles>15</meta:editing-cycles>
    <meta:generator>LibreOffice/26.2.0.3$Windows_X86_64 LibreOffice_project/620$Build-3</meta:generator>
    <meta:document-statistic meta:table-count="0" meta:image-count="0" meta:object-count="0" meta:page-count="16" meta:paragraph-count="566" meta:word-count="2386" meta:character-count="16423" meta:non-whitespace-character-count="13437"/>
  </office:meta>
</office:document-meta>
</file>