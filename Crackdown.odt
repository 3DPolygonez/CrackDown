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1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4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6">
      <style:paragraph-properties fo:margin-top="0cm" fo:margin-bottom="0cm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7">
      <style:paragraph-properties fo:margin-top="0cm" fo:margin-bottom="0cm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8">
      <style:paragraph-properties fo:margin-top="0cm" fo:margin-bottom="0cm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9">
      <style:paragraph-properties fo:margin-top="0cm" fo:margin-bottom="0cm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30">
      <style:paragraph-properties fo:margin-top="0cm" fo:margin-bottom="0cm" style:contextual-spacing="false"/>
    </style:style>
    <style:style style:name="P61" style:family="paragraph" style:parent-style-name="Text_20_body" style:list-style-name="L30"/>
    <style:style style:name="P62" style:family="paragraph" style:parent-style-name="Text_20_body" style:list-style-name="L31">
      <style:paragraph-properties fo:margin-top="0cm" fo:margin-bottom="0cm" style:contextual-spacing="false"/>
    </style:style>
    <style:style style:name="P63" style:family="paragraph" style:parent-style-name="Text_20_body" style:list-style-name="L31"/>
    <style:style style:name="P64" style:family="paragraph" style:parent-style-name="Text_20_body" style:list-style-name="L32">
      <style:paragraph-properties fo:margin-top="0cm" fo:margin-bottom="0cm" style:contextual-spacing="false"/>
    </style:style>
    <style:style style:name="P65" style:family="paragraph" style:parent-style-name="Text_20_body" style:list-style-name="L32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ant to create a game using threeJS that is based on Crackdown the Sega game from 1989 still for two players. Would you be able to help with that?</text:p>
      <text:p text:style-name="Text_20_body">Yes — and it’s a great idea. A modern browser-based take on something like Crack Down using Three.js is very doable, especially given your background.</text:p>
      <text:p text:style-name="Text_20_body">Let me ground this first though: don’t try to “recreate Crackdown” wholesale. That’s where projects stall. Instead, build a <text:span text:style-name="Strong_20_Emphasis">tight vertical slice</text:span> that captures the feel:</text:p>
      <text:list text:style-name="L1">
        <text:list-item>
          <text:p text:style-name="P2">top-down (or slight isometric) view </text:p>
        </text:list-item>
        <text:list-item>
          <text:p text:style-name="P2">twin-stick movement + shooting </text:p>
        </text:list-item>
        <text:list-item>
          <text:p text:style-name="P2">bombs / area attacks </text:p>
        </text:list-item>
        <text:list-item>
          <text:p text:style-name="P2">co-op 2-player </text:p>
        </text:list-item>
        <text:list-item>
          <text:p text:style-name="P3">simple enemy AI waves </text:p>
        </text:list-item>
      </text:list>
      <text:p text:style-name="Text_20_body">If you get <text:span text:style-name="Emphasis">that</text:span> working smoothly, you’ve basically got the core game.</text:p>
      <text:p text:style-name="Horizontal_20_Line"/>
      <text:h text:style-name="Heading_20_2" text:outline-level="2">What you’re really building (under the hood)</text:h>
      <text:p text:style-name="Text_20_body">Even though it looks simple, you’re combining a few systems:</text:p>
      <text:list text:style-name="L2">
        <text:list-item>
          <text:p text:style-name="P4"><text:span text:style-name="Strong_20_Emphasis">Rendering</text:span> → Three.js scene, camera, lighting </text:p>
        </text:list-item>
        <text:list-item>
          <text:p text:style-name="P4"><text:span text:style-name="Strong_20_Emphasis">Game loop</text:span> → update + render cycle </text:p>
        </text:list-item>
        <text:list-item>
          <text:p text:style-name="P4"><text:span text:style-name="Strong_20_Emphasis">Input</text:span> → keyboard + gamepads (2 players) </text:p>
        </text:list-item>
        <text:list-item>
          <text:p text:style-name="P4"><text:span text:style-name="Strong_20_Emphasis">Physics-lite</text:span> → movement + collision (no heavy physics engine needed) </text:p>
        </text:list-item>
        <text:list-item>
          <text:p text:style-name="P4"><text:span text:style-name="Strong_20_Emphasis">Entities</text:span> → players, enemies, bullets, pickups </text:p>
        </text:list-item>
        <text:list-item>
          <text:p text:style-name="P5"><text:span text:style-name="Strong_20_Emphasis">State</text:span> → score, lives, waves </text:p>
        </text:list-item>
      </text:list>
      <text:p text:style-name="Horizontal_20_Line"/>
      <text:h text:style-name="Heading_20_2" text:outline-level="2">Suggested architecture (keep it lean)</text:h>
      <text:p text:style-name="Text_20_body">Use something like this:</text:p>
      <text:section text:style-name="Sect1" text:name="code-block-viewer">
        <text:p text:style-name="P6"><text:span text:style-name="Source_20_Text">/src</text:span></text:p>
        <text:p text:style-name="Preformatted_20_Text"><text:span text:style-name="Source_20_Text"><text:s text:c="2"/>/core</text:span></text:p>
        <text:p text:style-name="Preformatted_20_Text"><text:span text:style-name="Source_20_Text"><text:s text:c="4"/>Game.js</text:span></text:p>
        <text:p text:style-name="Preformatted_20_Text"><text:span text:style-name="Source_20_Text"><text:s text:c="4"/>Input.js</text:span></text:p>
        <text:p text:style-name="Preformatted_20_Text"><text:span text:style-name="Source_20_Text"><text:s text:c="4"/>Loop.js</text:span></text:p>
        <text:p text:style-name="Preformatted_20_Text"><text:span text:style-name="Source_20_Text"><text:s text:c="2"/>/entities</text:span></text:p>
        <text:p text:style-name="Preformatted_20_Text"><text:span text:style-name="Source_20_Text"><text:s text:c="4"/>Player.js</text:span></text:p>
        <text:p text:style-name="Preformatted_20_Text"><text:span text:style-name="Source_20_Text"><text:s text:c="4"/>Enemy.js</text:span></text:p>
        <text:p text:style-name="Preformatted_20_Text"><text:span text:style-name="Source_20_Text"><text:s text:c="4"/>Bullet.js</text:span></text:p>
        <text:p text:style-name="Preformatted_20_Text"><text:span text:style-name="Source_20_Text"><text:s text:c="2"/>/systems</text:span></text:p>
        <text:p text:style-name="Preformatted_20_Text"><text:span text:style-name="Source_20_Text"><text:s text:c="4"/>CollisionSystem.js</text:span></text:p>
        <text:p text:style-name="Preformatted_20_Text"><text:span text:style-name="Source_20_Text"><text:s text:c="4"/>EnemySpawner.js</text:span></text:p>
        <text:p text:style-name="Preformatted_20_Text"><text:span text:style-name="Source_20_Text"><text:s text:c="2"/>/scenes</text:span></text:p>
        <text:p text:style-name="P7"><text:span text:style-name="Source_20_Text"><text:s text:c="4"/>MainScene.js</text:span></text:p>
      </text:section>
      <text:p text:style-name="Text_20_body">Avoid over-engineering early — no need for full ECS unless you feel it’s worth it later.</text:p>
      <text:p text:style-name="Horizontal_20_Line"/>
      <text:h text:style-name="Heading_20_2" text:outline-level="2"><text:soft-page-break/>Tech stack (simple + modern)</text:h>
      <text:list text:style-name="L3">
        <text:list-item>
          <text:p text:style-name="P8">Three.js (rendering) </text:p>
        </text:list-item>
        <text:list-item>
          <text:p text:style-name="P8">Vite (fast dev server) </text:p>
        </text:list-item>
        <text:list-item>
          <text:p text:style-name="P8">Vanilla JS or TypeScript (your call — TS helps as it grows) </text:p>
        </text:list-item>
        <text:list-item>
          <text:p text:style-name="P8">Optional later: </text:p>
          <text:list>
            <text:list-item>
              <text:p text:style-name="P8">Zustand or simple state store </text:p>
            </text:list-item>
            <text:list-item>
              <text:p text:style-name="P9">Socket.io (if you ever go online multiplayer) </text:p>
            </text:list-item>
          </text:list>
        </text:list-item>
      </text:list>
      <text:p text:style-name="Horizontal_20_Line"/>
      <text:h text:style-name="Heading_20_2" text:outline-level="2">Core prototype steps</text:h>
      <text:h text:style-name="Heading_20_3" text:outline-level="3">1. Basic scene + camera</text:h>
      <text:list text:style-name="L4">
        <text:list-item>
          <text:p text:style-name="P10">Orthographic camera (better for that arcade feel) </text:p>
        </text:list-item>
        <text:list-item>
          <text:p text:style-name="P11">Flat plane as the “floor” </text:p>
        </text:list-item>
      </text:list>
      <text:h text:style-name="Heading_20_3" text:outline-level="3">2. One player that can move + shoot</text:h>
      <text:list text:style-name="L5">
        <text:list-item>
          <text:p text:style-name="P12">WASD movement </text:p>
        </text:list-item>
        <text:list-item>
          <text:p text:style-name="P13">Mouse or arrow keys for direction shooting </text:p>
        </text:list-item>
      </text:list>
      <text:h text:style-name="Heading_20_3" text:outline-level="3">3. Second player</text:h>
      <text:list text:style-name="L6">
        <text:list-item>
          <text:p text:style-name="P14">Keyboard split OR gamepad support </text:p>
        </text:list-item>
      </text:list>
      <text:h text:style-name="Heading_20_3" text:outline-level="3">4. Enemies</text:h>
      <text:list text:style-name="L7">
        <text:list-item>
          <text:p text:style-name="P15">Move toward nearest player </text:p>
        </text:list-item>
        <text:list-item>
          <text:p text:style-name="P16">Die when hit </text:p>
        </text:list-item>
      </text:list>
      <text:h text:style-name="Heading_20_3" text:outline-level="3">5. Shooting + bombs</text:h>
      <text:list text:style-name="L8">
        <text:list-item>
          <text:p text:style-name="P17">Bullets = simple meshes </text:p>
        </text:list-item>
        <text:list-item>
          <text:p text:style-name="P18">Bomb = radial damage </text:p>
        </text:list-item>
      </text:list>
      <text:h text:style-name="Heading_20_3" text:outline-level="3">6. Game loop polish</text:h>
      <text:list text:style-name="L9">
        <text:list-item>
          <text:p text:style-name="P19">Spawn waves </text:p>
        </text:list-item>
        <text:list-item>
          <text:p text:style-name="P19">Add score </text:p>
        </text:list-item>
        <text:list-item>
          <text:p text:style-name="P20">Add basic UI overlay (HTML is fine) </text:p>
        </text:list-item>
      </text:list>
      <text:p text:style-name="Horizontal_20_Line"/>
      <text:h text:style-name="Heading_20_2" text:outline-level="2">Example: minimal game loop (Three.js)</text:h>
      <text:section text:style-name="Sect1" text:name="Section1">
        <text:p text:style-name="P6"><text:bookmark text:name="code-block-viewer"/><text:span text:style-name="Source_20_Text">function animate(time) {</text:span></text:p>
        <text:p text:style-name="Preformatted_20_Text"><text:span text:style-name="Source_20_Text"><text:s text:c="2"/>requestAnimationFrame(animate);</text:span></text:p>
        <text:p text:style-name="Preformatted_20_Text"><text:span text:style-name="Source_20_Text"><text:s text:c="2"/>const delta = clock.getDelta();</text:span></text:p>
        <text:p text:style-name="Preformatted_20_Text"><text:span text:style-name="Source_20_Text"><text:s text:c="2"/>updateGame(delta); // movement, AI, collisions</text:span></text:p>
        <text:p text:style-name="Preformatted_20_Text"><text:span text:style-name="Source_20_Text"><text:s text:c="2"/>renderer.render(scene, camera);</text:span></text:p>
        <text:p text:style-name="P7"><text:span text:style-name="Source_20_Text">}</text:span></text:p>
      </text:section>
      <text:p text:style-name="Horizontal_20_Line"><text:soft-page-break/></text:p>
      <text:h text:style-name="Heading_20_2" text:outline-level="2">Multiplayer (local co-op)</text:h>
      <text:p text:style-name="Text_20_body">Start <text:span text:style-name="Strong_20_Emphasis">local only</text:span>:</text:p>
      <text:list text:style-name="L10">
        <text:list-item>
          <text:p text:style-name="P21">Player 1 → WASD + Space </text:p>
        </text:list-item>
        <text:list-item>
          <text:p text:style-name="P22">Player 2 → Arrow keys + Enter </text:p>
        </text:list-item>
      </text:list>
      <text:p text:style-name="Text_20_body">Then add:</text:p>
      <text:list text:style-name="L11">
        <text:list-item>
          <text:p text:style-name="P23">Gamepad API (this is where it starts to feel like a real arcade game) </text:p>
        </text:list-item>
      </text:list>
      <text:p text:style-name="Horizontal_20_Line"/>
      <text:h text:style-name="Heading_20_2" text:outline-level="2">Visual style (important shortcut)</text:h>
      <text:p text:style-name="Text_20_body">Don’t go realistic. Lean into:</text:p>
      <text:list text:style-name="L12">
        <text:list-item>
          <text:p text:style-name="P24">low-poly or flat shading </text:p>
        </text:list-item>
        <text:list-item>
          <text:p text:style-name="P24">bright colors </text:p>
        </text:list-item>
        <text:list-item>
          <text:p text:style-name="P25">simple geometry </text:p>
        </text:list-item>
      </text:list>
      <text:p text:style-name="Text_20_body">This massively reduces effort while still looking intentional.</text:p>
      <text:p text:style-name="Horizontal_20_Line"/>
      <text:h text:style-name="Heading_20_2" text:outline-level="2">Where this can go (if it clicks)</text:h>
      <text:p text:style-name="Text_20_body">Once the core works, you can layer in:</text:p>
      <text:list text:style-name="L13">
        <text:list-item>
          <text:p text:style-name="P26">destructible environments </text:p>
        </text:list-item>
        <text:list-item>
          <text:p text:style-name="P26">power-ups </text:p>
        </text:list-item>
        <text:list-item>
          <text:p text:style-name="P26">time-based objectives (very Crackdown-like) </text:p>
        </text:list-item>
        <text:list-item>
          <text:p text:style-name="P27">sound + juice (screen shake, particles, flashes) </text:p>
        </text:list-item>
      </text:list>
      <text:p text:style-name="Horizontal_20_Line"/>
      <text:h text:style-name="Heading_20_2" text:outline-level="2">One thing I’d push you on</text:h>
      <text:p text:style-name="Text_20_body">The biggest risk isn’t technical — it’s scope creep.</text:p>
      <text:p text:style-name="Text_20_body">If your first milestone isn’t something like:</text:p>
      <text:p text:style-name="Quotations">“Two players, one screen, can move and shoot enemies for 60 seconds”</text:p>
      <text:p text:style-name="Text_20_body">…then you’re already overbuilding.</text:p>
      <text:p text:style-name="Horizontal_20_Line"/>
      <text:h text:style-name="Heading_20_2" text:outline-level="2">If you want, I can help you next with:</text:h>
      <text:list text:style-name="L14">
        <text:list-item>
          <text:p text:style-name="P28">a <text:span text:style-name="Strong_20_Emphasis">starter project scaffold (Vite + Three.js)</text:span> </text:p>
        </text:list-item>
        <text:list-item>
          <text:p text:style-name="P28">a <text:span text:style-name="Strong_20_Emphasis">Player controller implementation</text:span> </text:p>
        </text:list-item>
        <text:list-item>
          <text:p text:style-name="P29"><text:soft-page-break/>or a <text:span text:style-name="Strong_20_Emphasis">2-player input system (keyboard + gamepad)</text:span> </text:p>
        </text:list-item>
      </text:list>
      <text:p text:style-name="Text_20_body">Just tell me how hands-on you want to go — quick prototype vs something more structured.</text:p>
      <text:p text:style-name="Text_20_body">Glad to see it seems doable. Could you help me with a starter project using Vite + Three.js, a quick prototype approach so that I can look into it in more detail</text:p>
      <text:h text:style-name="Heading_20_1" text:outline-level="1">Quick Prototype Starter (Vite + Three.js)</text:h>
      <text:p text:style-name="Text_20_body">This setup is aimed at getting you from zero → “two cubes running around shooting” as fast as possible.</text:p>
      <text:p text:style-name="Horizontal_20_Line"/>
      <text:h text:style-name="Heading_20_2" text:outline-level="2">1. Create the project</text:h>
      <text:p text:style-name="Text_20_body">Open a terminal:</text:p>
      <text:section text:style-name="Sect1" text:name="Section2">
        <text:p text:style-name="P30"><text:bookmark text:name="code-block-viewer Copy 1"/><text:span text:style-name="Source_20_Text">npm create vite@latest crackdown-prototype -- --template vanilla</text:span></text:p>
      </text:section>
      <text:p text:style-name="Text_20_body">Go into the folder:</text:p>
      <text:section text:style-name="Sect1" text:name="Section3">
        <text:p text:style-name="P30"><text:bookmark text:name="code-block-viewer Copy 2"/><text:span text:style-name="Source_20_Text">cd crackdown-prototype</text:span></text:p>
      </text:section>
      <text:p text:style-name="Text_20_body">Install dependencies:</text:p>
      <text:section text:style-name="Sect1" text:name="Section4">
        <text:p text:style-name="P30"><text:bookmark text:name="code-block-viewer Copy 3"/><text:span text:style-name="Source_20_Text">npm install three</text:span></text:p>
      </text:section>
      <text:p text:style-name="Text_20_body">Start the dev server:</text:p>
      <text:section text:style-name="Sect1" text:name="Section5">
        <text:p text:style-name="P30"><text:bookmark text:name="code-block-viewer Copy 4"/><text:span text:style-name="Source_20_Text">npm run dev</text:span></text:p>
      </text:section>
      <text:p text:style-name="Horizontal_20_Line"/>
      <text:h text:style-name="Heading_20_2" text:outline-level="2">2. Project structure</text:h>
      <text:p text:style-name="Text_20_body">Replace the default structure with this:</text:p>
      <text:section text:style-name="Sect1" text:name="Section6">
        <text:p text:style-name="P6"><text:bookmark text:name="code-block-viewer Copy 5"/><text:span text:style-name="Source_20_Text">/src</text:span></text:p>
        <text:p text:style-name="Preformatted_20_Text"><text:span text:style-name="Source_20_Text"><text:s text:c="2"/>main.js</text:span></text:p>
        <text:p text:style-name="Preformatted_20_Text"><text:span text:style-name="Source_20_Text"><text:s text:c="2"/>style.css</text:span></text:p>
        <text:p text:style-name="Preformatted_20_Text"><text:span text:style-name="Source_20_Text"><text:s text:c="2"/>/core</text:span></text:p>
        <text:p text:style-name="Preformatted_20_Text"><text:span text:style-name="Source_20_Text"><text:s text:c="4"/>Game.js</text:span></text:p>
        <text:p text:style-name="Preformatted_20_Text"><text:span text:style-name="Source_20_Text"><text:s text:c="4"/>Input.js</text:span></text:p>
        <text:p text:style-name="Preformatted_20_Text"><text:span text:style-name="Source_20_Text"><text:s text:c="2"/>/entities</text:span></text:p>
        <text:p text:style-name="Preformatted_20_Text"><text:span text:style-name="Source_20_Text"><text:s text:c="4"/>Player.js</text:span></text:p>
        <text:p text:style-name="P7"><text:span text:style-name="Source_20_Text"><text:s text:c="4"/>Bullet.js</text:span></text:p>
      </text:section>
      <text:p text:style-name="Horizontal_20_Line"/>
      <text:h text:style-name="Heading_20_2" text:outline-level="2">3. main.js</text:h>
      <text:section text:style-name="Sect1" text:name="Section7">
        <text:p text:style-name="P6"><text:bookmark text:name="code-block-viewer Copy 6"/><text:span text:style-name="Source_20_Text">import './style.css';</text:span></text:p>
        <text:p text:style-name="Preformatted_20_Text"><text:span text:style-name="Source_20_Text">import { Game } from './core/Game';</text:span></text:p>
        <text:p text:style-name="Preformatted_20_Text"><text:span text:style-name="Source_20_Text">const game = new Game();</text:span></text:p>
        <text:p text:style-name="P7"><text:span text:style-name="Source_20_Text">game.start();</text:span></text:p>
      </text:section>
      <text:p text:style-name="Horizontal_20_Line"><text:soft-page-break/></text:p>
      <text:h text:style-name="Heading_20_2" text:outline-level="2">4. style.css</text:h>
      <text:section text:style-name="Sect1" text:name="Section8">
        <text:p text:style-name="P6"><text:bookmark text:name="code-block-viewer Copy 7"/><text:span text:style-name="Source_20_Text">body {</text:span></text:p>
        <text:p text:style-name="Preformatted_20_Text"><text:span text:style-name="Source_20_Text"><text:s text:c="2"/>margin: 0;</text:span></text:p>
        <text:p text:style-name="Preformatted_20_Text"><text:span text:style-name="Source_20_Text"><text:s text:c="2"/>overflow: hidden;</text:span></text:p>
        <text:p text:style-name="Preformatted_20_Text"><text:span text:style-name="Source_20_Text"><text:s text:c="2"/>background: black;</text:span></text:p>
        <text:p text:style-name="Preformatted_20_Text"><text:span text:style-name="Source_20_Text">}</text:span></text:p>
        <text:p text:style-name="Preformatted_20_Text"><text:span text:style-name="Source_20_Text">canvas {</text:span></text:p>
        <text:p text:style-name="Preformatted_20_Text"><text:span text:style-name="Source_20_Text"><text:s text:c="2"/>display: block;</text:span></text:p>
        <text:p text:style-name="P7"><text:span text:style-name="Source_20_Text">}</text:span></text:p>
      </text:section>
      <text:p text:style-name="Horizontal_20_Line"/>
      <text:h text:style-name="Heading_20_2" text:outline-level="2">5. core/Input.js</text:h>
      <text:p text:style-name="Text_20_body">This gives simple keyboard tracking.</text:p>
      <text:section text:style-name="Sect1" text:name="Section9">
        <text:p text:style-name="P6"><text:bookmark text:name="code-block-viewer Copy 8"/><text:span text:style-name="Source_20_Text">export class Input {</text:span></text:p>
        <text:p text:style-name="Preformatted_20_Text"><text:span text:style-name="Source_20_Text"><text:s text:c="2"/>constructor() {</text:span></text:p>
        <text:p text:style-name="Preformatted_20_Text"><text:span text:style-name="Source_20_Text"><text:s text:c="4"/>this.keys = {};</text:span></text:p>
        <text:p text:style-name="Preformatted_20_Text"><text:span text:style-name="Source_20_Text"><text:s text:c="4"/>window.addEventListener('keydown', (e) =&gt; {</text:span></text:p>
        <text:p text:style-name="Preformatted_20_Text"><text:span text:style-name="Source_20_Text"><text:s text:c="6"/>this.keys[e.code] = true;</text:span></text:p>
        <text:p text:style-name="Preformatted_20_Text"><text:span text:style-name="Source_20_Text"><text:s text:c="4"/>});</text:span></text:p>
        <text:p text:style-name="Preformatted_20_Text"><text:span text:style-name="Source_20_Text"><text:s text:c="4"/>window.addEventListener('keyup', (e) =&gt; {</text:span></text:p>
        <text:p text:style-name="Preformatted_20_Text"><text:span text:style-name="Source_20_Text"><text:s text:c="6"/>this.keys[e.code] = false;</text:span></text:p>
        <text:p text:style-name="Preformatted_20_Text"><text:span text:style-name="Source_20_Text"><text:s text:c="4"/>}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isDown(key) {</text:span></text:p>
        <text:p text:style-name="Preformatted_20_Text"><text:span text:style-name="Source_20_Text"><text:s text:c="4"/>return !!this.keys[key];</text:span></text:p>
        <text:p text:style-name="Preformatted_20_Text"><text:span text:style-name="Source_20_Text"><text:s text:c="2"/>}</text:span></text:p>
        <text:p text:style-name="P7"><text:span text:style-name="Source_20_Text">}</text:span></text:p>
      </text:section>
      <text:p text:style-name="Horizontal_20_Line"/>
      <text:h text:style-name="Heading_20_2" text:outline-level="2">6. entities/Bullet.js</text:h>
      <text:section text:style-name="Sect1" text:name="Section10">
        <text:p text:style-name="P6"><text:bookmark text:name="code-block-viewer Copy 9"/><text:span text:style-name="Source_20_Text">import * as THREE from 'three';</text:span></text:p>
        <text:p text:style-name="Preformatted_20_Text"><text:span text:style-name="Source_20_Text">export class Bullet {</text:span></text:p>
        <text:p text:style-name="Preformatted_20_Text"><text:span text:style-name="Source_20_Text"><text:s text:c="2"/>constructor(position, direction) {</text:span></text:p>
        <text:p text:style-name="Preformatted_20_Text"><text:span text:style-name="Source_20_Text"><text:s text:c="4"/>const geometry = new THREE.BoxGeometry(0.1, 0.1, 0.1);</text:span></text:p>
        <text:p text:style-name="Preformatted_20_Text"><text:span text:style-name="Source_20_Text"><text:s text:c="4"/>const material = new THREE.MeshBasicMaterial({ color: 0xffff00 });</text:span></text:p>
        <text:p text:style-name="Preformatted_20_Text"><text:span text:style-name="Source_20_Text"><text:s text:c="4"/>this.mesh = new THREE.Mesh(geometry, material);</text:span></text:p>
        <text:p text:style-name="Preformatted_20_Text"><text:span text:style-name="Source_20_Text"><text:s text:c="4"/>this.mesh.position.copy(position);</text:span></text:p>
        <text:p text:style-name="Preformatted_20_Text"><text:span text:style-name="Source_20_Text"><text:s text:c="4"/>this.velocity = direction.clone().multiplyScalar(10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update(delta) {</text:span></text:p>
        <text:p text:style-name="Preformatted_20_Text"><text:span text:style-name="Source_20_Text"><text:s text:c="4"/>this.mesh.position.add(</text:span></text:p>
        <text:p text:style-name="Preformatted_20_Text"><text:span text:style-name="Source_20_Text"><text:s text:c="6"/>this.velocity.clone().multiplyScalar(delta)</text:span></text:p>
        <text:p text:style-name="Preformatted_20_Text"><text:span text:style-name="Source_20_Text"><text:s text:c="4"/>);</text:span></text:p>
        <text:p text:style-name="Preformatted_20_Text"><text:span text:style-name="Source_20_Text"><text:s text:c="2"/>}</text:span></text:p>
        <text:p text:style-name="P7"><text:span text:style-name="Source_20_Text">}</text:span></text:p>
      </text:section>
      <text:p text:style-name="Horizontal_20_Line"/>
      <text:h text:style-name="Heading_20_2" text:outline-level="2"><text:soft-page-break/>7. entities/Player.js</text:h>
      <text:p text:style-name="Text_20_body">This is intentionally simple and arcade-like.</text:p>
      <text:section text:style-name="Sect1" text:name="Section11">
        <text:p text:style-name="P6"><text:bookmark text:name="code-block-viewer Copy 10"/><text:span text:style-name="Source_20_Text">import * as THREE from 'three';</text:span></text:p>
        <text:p text:style-name="Preformatted_20_Text"><text:span text:style-name="Source_20_Text">import { Bullet } from './Bullet';</text:span></text:p>
        <text:p text:style-name="Preformatted_20_Text"><text:span text:style-name="Source_20_Text">export class Player {</text:span></text:p>
        <text:p text:style-name="Preformatted_20_Text"><text:span text:style-name="Source_20_Text"><text:s text:c="2"/>constructor(color, controls) {</text:span></text:p>
        <text:p text:style-name="Preformatted_20_Text"><text:span text:style-name="Source_20_Text"><text:s text:c="4"/>this.controls = controls;</text:span></text:p>
        <text:p text:style-name="Preformatted_20_Text"><text:span text:style-name="Source_20_Text"><text:s text:c="4"/>const geometry = new THREE.BoxGeometry(1, 1, 1);</text:span></text:p>
        <text:p text:style-name="Preformatted_20_Text"><text:span text:style-name="Source_20_Text"><text:s text:c="4"/>const material = new THREE.MeshPhongMaterial({ color });</text:span></text:p>
        <text:p text:style-name="Preformatted_20_Text"><text:span text:style-name="Source_20_Text"><text:s text:c="4"/>this.mesh = new THREE.Mesh(geometry, material);</text:span></text:p>
        <text:p text:style-name="Preformatted_20_Text"><text:span text:style-name="Source_20_Text"><text:s text:c="4"/>this.speed = 5;</text:span></text:p>
        <text:p text:style-name="Preformatted_20_Text"><text:span text:style-name="Source_20_Text"><text:s text:c="4"/>this.bullets = [];</text:span></text:p>
        <text:p text:style-name="Preformatted_20_Text"><text:span text:style-name="Source_20_Text"><text:s text:c="4"/>this.shootCooldown = 0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update(delta, input, scene) {</text:span></text:p>
        <text:p text:style-name="Preformatted_20_Text"><text:span text:style-name="Source_20_Text"><text:s text:c="4"/>const move = new THREE.Vector3();</text:span></text:p>
        <text:p text:style-name="Preformatted_20_Text"><text:span text:style-name="Source_20_Text"><text:s text:c="4"/>if (input.isDown(this.controls.left)) move.x -= 1;</text:span></text:p>
        <text:p text:style-name="Preformatted_20_Text"><text:span text:style-name="Source_20_Text"><text:s text:c="4"/>if (input.isDown(this.controls.right)) move.x += 1;</text:span></text:p>
        <text:p text:style-name="Preformatted_20_Text"><text:span text:style-name="Source_20_Text"><text:s text:c="4"/>if (input.isDown(this.controls.up)) move.z -= 1;</text:span></text:p>
        <text:p text:style-name="Preformatted_20_Text"><text:span text:style-name="Source_20_Text"><text:s text:c="4"/>if (input.isDown(this.controls.down)) move.z += 1;</text:span></text:p>
        <text:p text:style-name="Preformatted_20_Text"><text:span text:style-name="Source_20_Text"><text:s text:c="4"/>move.normalize();</text:span></text:p>
        <text:p text:style-name="Preformatted_20_Text"><text:span text:style-name="Source_20_Text"><text:s text:c="4"/>this.mesh.position.add(</text:span></text:p>
        <text:p text:style-name="Preformatted_20_Text"><text:span text:style-name="Source_20_Text"><text:s text:c="6"/>move.multiplyScalar(this.speed * delta)</text:span></text:p>
        <text:p text:style-name="Preformatted_20_Text"><text:span text:style-name="Source_20_Text"><text:s text:c="4"/>);</text:span></text:p>
        <text:p text:style-name="Preformatted_20_Text"><text:span text:style-name="Source_20_Text"><text:s text:c="4"/>this.shootCooldown -= delta;</text:span></text:p>
        <text:p text:style-name="Preformatted_20_Text"><text:span text:style-name="Source_20_Text"><text:s text:c="4"/>if (</text:span></text:p>
        <text:p text:style-name="Preformatted_20_Text"><text:span text:style-name="Source_20_Text"><text:s text:c="6"/>input.isDown(this.controls.fire) &amp;&amp;</text:span></text:p>
        <text:p text:style-name="Preformatted_20_Text"><text:span text:style-name="Source_20_Text"><text:s text:c="6"/>this.shootCooldown &lt;= 0</text:span></text:p>
        <text:p text:style-name="Preformatted_20_Text"><text:span text:style-name="Source_20_Text"><text:s text:c="4"/>) {</text:span></text:p>
        <text:p text:style-name="Preformatted_20_Text"><text:span text:style-name="Source_20_Text"><text:s text:c="6"/>this.shoot(scene);</text:span></text:p>
        <text:p text:style-name="Preformatted_20_Text"><text:span text:style-name="Source_20_Text"><text:s text:c="6"/>this.shootCooldown = 0.25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for (const bullet of this.bullets) {</text:span></text:p>
        <text:p text:style-name="Preformatted_20_Text"><text:span text:style-name="Source_20_Text"><text:s text:c="6"/>bullet.update(delta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shoot(scene) {</text:span></text:p>
        <text:p text:style-name="Preformatted_20_Text"><text:span text:style-name="Source_20_Text"><text:s text:c="4"/>const direction = new THREE.Vector3(0, 0, -1);</text:span></text:p>
        <text:p text:style-name="Preformatted_20_Text"><text:span text:style-name="Source_20_Text"><text:s text:c="4"/>const bullet = new Bullet(</text:span></text:p>
        <text:p text:style-name="Preformatted_20_Text"><text:span text:style-name="Source_20_Text"><text:s text:c="6"/>this.mesh.position.clone(),</text:span></text:p>
        <text:p text:style-name="Preformatted_20_Text"><text:span text:style-name="Source_20_Text"><text:s text:c="6"/>direction</text:span></text:p>
        <text:p text:style-name="Preformatted_20_Text"><text:span text:style-name="Source_20_Text"><text:s text:c="4"/>);</text:span></text:p>
        <text:p text:style-name="Preformatted_20_Text"><text:span text:style-name="Source_20_Text"><text:s text:c="4"/>this.bullets.push(bullet);</text:span></text:p>
        <text:p text:style-name="Preformatted_20_Text"><text:span text:style-name="Source_20_Text"><text:s text:c="4"/>scene.add(bullet.mesh);</text:span></text:p>
        <text:p text:style-name="Preformatted_20_Text"><text:span text:style-name="Source_20_Text"><text:s text:c="2"/>}</text:span></text:p>
        <text:p text:style-name="P7"><text:span text:style-name="Source_20_Text">}</text:span></text:p>
      </text:section>
      <text:p text:style-name="Horizontal_20_Line"/>
      <text:h text:style-name="Heading_20_2" text:outline-level="2">8. core/Game.js</text:h>
      <text:p text:style-name="Text_20_body">This wires everything together.</text:p>
      <text:section text:style-name="Sect1" text:name="Section12">
        <text:p text:style-name="P6"><text:bookmark text:name="code-block-viewer Copy 11"/><text:span text:style-name="Source_20_Text">import * as THREE from 'three';</text:span></text:p>
        <text:p text:style-name="Preformatted_20_Text"><text:span text:style-name="Source_20_Text">import { Input } from './Input';</text:span></text:p>
        <text:p text:style-name="Preformatted_20_Text"><text:span text:style-name="Source_20_Text">import { Player } from '../entities/Player';</text:span></text:p>
        <text:p text:style-name="Preformatted_20_Text"><text:span text:style-name="Source_20_Text">export class Game {</text:span></text:p>
        <text:p text:style-name="Preformatted_20_Text"><text:span text:style-name="Source_20_Text"><text:s text:c="2"/>constructor() {</text:span></text:p>
        <text:p text:style-name="Preformatted_20_Text"><text:span text:style-name="Source_20_Text"><text:s text:c="4"/>this.scene = new THREE.Scene();</text:span></text:p>
        <text:p text:style-name="Preformatted_20_Text"><text:span text:style-name="Source_20_Text"><text:s text:c="4"/>this.camera = new THREE.OrthographicCamera(</text:span></text:p>
        <text:p text:style-name="Preformatted_20_Text"><text:soft-page-break/><text:span text:style-name="Source_20_Text"><text:s text:c="6"/>window.innerWidth / -50,</text:span></text:p>
        <text:p text:style-name="Preformatted_20_Text"><text:span text:style-name="Source_20_Text"><text:s text:c="6"/>window.innerWidth / 50,</text:span></text:p>
        <text:p text:style-name="Preformatted_20_Text"><text:span text:style-name="Source_20_Text"><text:s text:c="6"/>window.innerHeight / 50,</text:span></text:p>
        <text:p text:style-name="Preformatted_20_Text"><text:span text:style-name="Source_20_Text"><text:s text:c="6"/>window.innerHeight / -50,</text:span></text:p>
        <text:p text:style-name="Preformatted_20_Text"><text:span text:style-name="Source_20_Text"><text:s text:c="6"/>0.1,</text:span></text:p>
        <text:p text:style-name="Preformatted_20_Text"><text:span text:style-name="Source_20_Text"><text:s text:c="6"/>1000</text:span></text:p>
        <text:p text:style-name="Preformatted_20_Text"><text:span text:style-name="Source_20_Text"><text:s text:c="4"/>);</text:span></text:p>
        <text:p text:style-name="Preformatted_20_Text"><text:span text:style-name="Source_20_Text"><text:s text:c="4"/>this.camera.position.set(0, 20, 0);</text:span></text:p>
        <text:p text:style-name="Preformatted_20_Text"><text:span text:style-name="Source_20_Text"><text:s text:c="4"/>this.camera.lookAt(0, 0, 0);</text:span></text:p>
        <text:p text:style-name="Preformatted_20_Text"><text:span text:style-name="Source_20_Text"><text:s text:c="4"/>this.renderer = new THREE.WebGLRenderer({</text:span></text:p>
        <text:p text:style-name="Preformatted_20_Text"><text:span text:style-name="Source_20_Text"><text:s text:c="6"/>antialias: true,</text:span></text:p>
        <text:p text:style-name="Preformatted_20_Text"><text:span text:style-name="Source_20_Text"><text:s text:c="4"/>});</text:span></text:p>
        <text:p text:style-name="Preformatted_20_Text"><text:span text:style-name="Source_20_Text"><text:s text:c="4"/>this.renderer.setSize(</text:span></text:p>
        <text:p text:style-name="Preformatted_20_Text"><text:span text:style-name="Source_20_Text"><text:s text:c="6"/>window.innerWidth,</text:span></text:p>
        <text:p text:style-name="Preformatted_20_Text"><text:span text:style-name="Source_20_Text"><text:s text:c="6"/>window.innerHeight</text:span></text:p>
        <text:p text:style-name="Preformatted_20_Text"><text:span text:style-name="Source_20_Text"><text:s text:c="4"/>);</text:span></text:p>
        <text:p text:style-name="Preformatted_20_Text"><text:span text:style-name="Source_20_Text"><text:s text:c="4"/>document.body.appendChild(this.renderer.domElement);</text:span></text:p>
        <text:p text:style-name="Preformatted_20_Text"><text:span text:style-name="Source_20_Text"><text:s text:c="4"/>this.input = new Input();</text:span></text:p>
        <text:p text:style-name="Preformatted_20_Text"><text:span text:style-name="Source_20_Text"><text:s text:c="4"/>const light = new THREE.DirectionalLight(0xffffff, 1);</text:span></text:p>
        <text:p text:style-name="Preformatted_20_Text"><text:span text:style-name="Source_20_Text"><text:s text:c="4"/>light.position.set(10, 20, 10);</text:span></text:p>
        <text:p text:style-name="Preformatted_20_Text"><text:span text:style-name="Source_20_Text"><text:s text:c="4"/>this.scene.add(light);</text:span></text:p>
        <text:p text:style-name="Preformatted_20_Text"><text:span text:style-name="Source_20_Text"><text:s text:c="4"/>const floor = new THREE.Mesh(</text:span></text:p>
        <text:p text:style-name="Preformatted_20_Text"><text:span text:style-name="Source_20_Text"><text:s text:c="6"/>new THREE.PlaneGeometry(50, 50),</text:span></text:p>
        <text:p text:style-name="Preformatted_20_Text"><text:span text:style-name="Source_20_Text"><text:s text:c="6"/>new THREE.MeshPhongMaterial({</text:span></text:p>
        <text:p text:style-name="Preformatted_20_Text"><text:span text:style-name="Source_20_Text"><text:s text:c="8"/>color: 0x222222,</text:span></text:p>
        <text:p text:style-name="Preformatted_20_Text"><text:span text:style-name="Source_20_Text"><text:s text:c="6"/>})</text:span></text:p>
        <text:p text:style-name="Preformatted_20_Text"><text:span text:style-name="Source_20_Text"><text:s text:c="4"/>);</text:span></text:p>
        <text:p text:style-name="Preformatted_20_Text"><text:span text:style-name="Source_20_Text"><text:s text:c="4"/>floor.rotation.x = -Math.PI / 2;</text:span></text:p>
        <text:p text:style-name="Preformatted_20_Text"><text:span text:style-name="Source_20_Text"><text:s text:c="4"/>this.scene.add(floor);</text:span></text:p>
        <text:p text:style-name="Preformatted_20_Text"><text:span text:style-name="Source_20_Text"><text:s text:c="4"/>this.player1 = new Player(0x00ff00, {</text:span></text:p>
        <text:p text:style-name="Preformatted_20_Text"><text:span text:style-name="Source_20_Text"><text:s text:c="6"/>up: 'KeyW',</text:span></text:p>
        <text:p text:style-name="Preformatted_20_Text"><text:span text:style-name="Source_20_Text"><text:s text:c="6"/>down: 'KeyS',</text:span></text:p>
        <text:p text:style-name="Preformatted_20_Text"><text:span text:style-name="Source_20_Text"><text:s text:c="6"/>left: 'KeyA',</text:span></text:p>
        <text:p text:style-name="Preformatted_20_Text"><text:span text:style-name="Source_20_Text"><text:s text:c="6"/>right: 'KeyD',</text:span></text:p>
        <text:p text:style-name="Preformatted_20_Text"><text:span text:style-name="Source_20_Text"><text:s text:c="6"/>fire: 'Space',</text:span></text:p>
        <text:p text:style-name="Preformatted_20_Text"><text:span text:style-name="Source_20_Text"><text:s text:c="4"/>});</text:span></text:p>
        <text:p text:style-name="Preformatted_20_Text"><text:span text:style-name="Source_20_Text"><text:s text:c="4"/>this.player2 = new Player(0x00aaff, {</text:span></text:p>
        <text:p text:style-name="Preformatted_20_Text"><text:span text:style-name="Source_20_Text"><text:s text:c="6"/>up: 'ArrowUp',</text:span></text:p>
        <text:p text:style-name="Preformatted_20_Text"><text:span text:style-name="Source_20_Text"><text:s text:c="6"/>down: 'ArrowDown',</text:span></text:p>
        <text:p text:style-name="Preformatted_20_Text"><text:span text:style-name="Source_20_Text"><text:s text:c="6"/>left: 'ArrowLeft',</text:span></text:p>
        <text:p text:style-name="Preformatted_20_Text"><text:span text:style-name="Source_20_Text"><text:s text:c="6"/>right: 'ArrowRight',</text:span></text:p>
        <text:p text:style-name="Preformatted_20_Text"><text:span text:style-name="Source_20_Text"><text:s text:c="6"/>fire: 'Enter',</text:span></text:p>
        <text:p text:style-name="Preformatted_20_Text"><text:span text:style-name="Source_20_Text"><text:s text:c="4"/>});</text:span></text:p>
        <text:p text:style-name="Preformatted_20_Text"><text:span text:style-name="Source_20_Text"><text:s text:c="4"/>this.player2.mesh.position.x = 5;</text:span></text:p>
        <text:p text:style-name="Preformatted_20_Text"><text:span text:style-name="Source_20_Text"><text:s text:c="4"/>this.scene.add(this.player1.mesh);</text:span></text:p>
        <text:p text:style-name="Preformatted_20_Text"><text:span text:style-name="Source_20_Text"><text:s text:c="4"/>this.scene.add(this.player2.mesh);</text:span></text:p>
        <text:p text:style-name="Preformatted_20_Text"><text:span text:style-name="Source_20_Text"><text:s text:c="4"/>this.clock = new THREE.Clock(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start() {</text:span></text:p>
        <text:p text:style-name="Preformatted_20_Text"><text:span text:style-name="Source_20_Text"><text:s text:c="4"/>this.animate(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animate() {</text:span></text:p>
        <text:p text:style-name="Preformatted_20_Text"><text:span text:style-name="Source_20_Text"><text:s text:c="4"/>requestAnimationFrame(() =&gt; this.animate());</text:span></text:p>
        <text:p text:style-name="Preformatted_20_Text"><text:span text:style-name="Source_20_Text"><text:s text:c="4"/>const delta = this.clock.getDelta();</text:span></text:p>
        <text:p text:style-name="Preformatted_20_Text"><text:span text:style-name="Source_20_Text"><text:s text:c="4"/>this.player1.update(delta, this.input, this.scene);</text:span></text:p>
        <text:p text:style-name="Preformatted_20_Text"><text:span text:style-name="Source_20_Text"><text:s text:c="4"/>this.player2.update(delta, this.input, this.scene);</text:span></text:p>
        <text:p text:style-name="Preformatted_20_Text"><text:span text:style-name="Source_20_Text"><text:s text:c="4"/>this.renderer.render(this.scene, this.camera);</text:span></text:p>
        <text:p text:style-name="Preformatted_20_Text"><text:span text:style-name="Source_20_Text"><text:s text:c="2"/>}</text:span></text:p>
        <text:p text:style-name="P7"><text:span text:style-name="Source_20_Text">}</text:span></text:p>
      </text:section>
      <text:p text:style-name="Horizontal_20_Line"/>
      <text:h text:style-name="Heading_20_2" text:outline-level="2"><text:soft-page-break/>What you’ll get</text:h>
      <text:p text:style-name="Text_20_body">Once running:</text:p>
      <text:list text:style-name="L15">
        <text:list-item>
          <text:p text:style-name="P31">2-player local movement </text:p>
        </text:list-item>
        <text:list-item>
          <text:p text:style-name="P31">Shooting </text:p>
        </text:list-item>
        <text:list-item>
          <text:p text:style-name="P31">Orthographic arcade camera </text:p>
        </text:list-item>
        <text:list-item>
          <text:p text:style-name="P31">Proper game loop </text:p>
        </text:list-item>
        <text:list-item>
          <text:p text:style-name="P32">A clean structure you can extend </text:p>
        </text:list-item>
      </text:list>
      <text:p text:style-name="Text_20_body">It won’t look impressive yet — but architecturally it’s the important first step.</text:p>
      <text:p text:style-name="Horizontal_20_Line"/>
      <text:h text:style-name="Heading_20_2" text:outline-level="2">Your next upgrade path</text:h>
      <text:p text:style-name="Text_20_body">After this, I’d recommend this exact order:</text:p>
      <text:h text:style-name="Heading_20_3" text:outline-level="3">Phase 1</text:h>
      <text:list text:style-name="L16">
        <text:list-item>
          <text:p text:style-name="P33">Rotate players toward movement </text:p>
        </text:list-item>
        <text:list-item>
          <text:p text:style-name="P33">Bullet cleanup </text:p>
        </text:list-item>
        <text:list-item>
          <text:p text:style-name="P33">Enemy spawning </text:p>
        </text:list-item>
        <text:list-item>
          <text:p text:style-name="P34">Collision detection </text:p>
        </text:list-item>
      </text:list>
      <text:h text:style-name="Heading_20_3" text:outline-level="3">Phase 2</text:h>
      <text:list text:style-name="L17">
        <text:list-item>
          <text:p text:style-name="P35">Sprite art or low-poly models </text:p>
        </text:list-item>
        <text:list-item>
          <text:p text:style-name="P35">Explosions </text:p>
        </text:list-item>
        <text:list-item>
          <text:p text:style-name="P35">Sound effects </text:p>
        </text:list-item>
        <text:list-item>
          <text:p text:style-name="P36">Bomb mechanic </text:p>
        </text:list-item>
      </text:list>
      <text:h text:style-name="Heading_20_3" text:outline-level="3">Phase 3</text:h>
      <text:list text:style-name="L18">
        <text:list-item>
          <text:p text:style-name="P37">Tile-based maps </text:p>
        </text:list-item>
        <text:list-item>
          <text:p text:style-name="P37">Doors/objectives </text:p>
        </text:list-item>
        <text:list-item>
          <text:p text:style-name="P37">Wave progression </text:p>
        </text:list-item>
        <text:list-item>
          <text:p text:style-name="P38">UI/HUD </text:p>
        </text:list-item>
      </text:list>
      <text:h text:style-name="Heading_20_3" text:outline-level="3">Phase 4</text:h>
      <text:list text:style-name="L19">
        <text:list-item>
          <text:p text:style-name="P39">Gamepad support </text:p>
        </text:list-item>
        <text:list-item>
          <text:p text:style-name="P39">Menu system </text:p>
        </text:list-item>
        <text:list-item>
          <text:p text:style-name="P40">Online co-op (optional) </text:p>
        </text:list-item>
      </text:list>
      <text:p text:style-name="Horizontal_20_Line"/>
      <text:h text:style-name="Heading_20_2" text:outline-level="2">Useful official resources</text:h>
      <text:list text:style-name="L20">
        <text:list-item>
          <text:p text:style-name="P41"><text:a xlink:type="simple" xlink:href="https://threejs.org/?utm_source=chatgpt.com" office:target-frame-name="_blank" xlink:show="new" text:style-name="Internet_20_link" text:visited-style-name="Visited_20_Internet_20_Link">Three.js Official Site</text:a> </text:p>
        </text:list-item>
        <text:list-item>
          <text:p text:style-name="P41"><text:a xlink:type="simple" xlink:href="https://threejs.org/examples/?utm_source=chatgpt.com" office:target-frame-name="_blank" xlink:show="new" text:style-name="Internet_20_link" text:visited-style-name="Visited_20_Internet_20_Link">Three.js Examples</text:a> </text:p>
        </text:list-item>
        <text:list-item>
          <text:p text:style-name="P41"><text:a xlink:type="simple" xlink:href="https://vitejs.dev/?utm_source=chatgpt.com" office:target-frame-name="_blank" xlink:show="new" text:style-name="Internet_20_link" text:visited-style-name="Visited_20_Internet_20_Link">Vite Documentation</text:a> </text:p>
        </text:list-item>
        <text:list-item>
          <text:p text:style-name="P42"><text:a xlink:type="simple" xlink:href="https://developer.mozilla.org/en-US/docs/Web/API/Gamepad_API?utm_source=chatgpt.com" office:target-frame-name="_blank" xlink:show="new" text:style-name="Internet_20_link" text:visited-style-name="Visited_20_Internet_20_Link"><text:soft-page-break/>MDN Gamepad API Docs</text:a> </text:p>
        </text:list-item>
      </text:list>
      <text:p text:style-name="Text_20_body">You’re actually in a very good spot for this kind of project because the scope can stay intentionally arcade-sized. That’s exactly where solo game projects have the best chance of becoming real.</text:p>
      <text:p text:style-name="Text_20_body">From the phase 1 to do list, could I get a hand with the enemy spawning step, I assume this would also include automated movement and in the future awareness of obstacles?</text:p>
      <text:p text:style-name="Text_20_body">Yes — and this is exactly the right next step.</text:p>
      <text:p text:style-name="Text_20_body">What you’re really building now is your first <text:span text:style-name="Strong_20_Emphasis">gameplay system</text:span>:</text:p>
      <text:list text:style-name="L21">
        <text:list-item>
          <text:p text:style-name="P43">enemy spawning </text:p>
        </text:list-item>
        <text:list-item>
          <text:p text:style-name="P43">enemy lifecycle </text:p>
        </text:list-item>
        <text:list-item>
          <text:p text:style-name="P43">movement AI </text:p>
        </text:list-item>
        <text:list-item>
          <text:p text:style-name="P43">targeting </text:p>
        </text:list-item>
        <text:list-item>
          <text:p text:style-name="P43">collision preparation </text:p>
        </text:list-item>
        <text:list-item>
          <text:p text:style-name="P44">eventually pathfinding / obstacle avoidance </text:p>
        </text:list-item>
      </text:list>
      <text:p text:style-name="Text_20_body">The good news is: you do <text:span text:style-name="Strong_20_Emphasis">not</text:span> need “real AI” yet.</text:p>
      <text:p text:style-name="Text_20_body">For a Crackdown-style prototype, the classic formula is:</text:p>
      <text:p text:style-name="Quotations">“Enemies continuously move toward the nearest player.”</text:p>
      <text:p text:style-name="Text_20_body">That alone already feels like a game.</text:p>
      <text:p text:style-name="Horizontal_20_Line"/>
      <text:h text:style-name="Heading_20_1" text:outline-level="1">Recommended approach</text:h>
      <text:p text:style-name="Text_20_body">Keep it simple initially:</text:p>
      <text:h text:style-name="Heading_20_2" text:outline-level="2">Version 1 (now)</text:h>
      <text:list text:style-name="L22">
        <text:list-item>
          <text:p text:style-name="P45">Spawn enemies at map edges </text:p>
        </text:list-item>
        <text:list-item>
          <text:p text:style-name="P45">Move directly toward nearest player </text:p>
        </text:list-item>
        <text:list-item>
          <text:p text:style-name="P46">Destroy when hit </text:p>
        </text:list-item>
      </text:list>
      <text:h text:style-name="Heading_20_2" text:outline-level="2">Version 2</text:h>
      <text:list text:style-name="L23">
        <text:list-item>
          <text:p text:style-name="P47">Avoid overlapping </text:p>
        </text:list-item>
        <text:list-item>
          <text:p text:style-name="P48">Simple steering around walls </text:p>
        </text:list-item>
      </text:list>
      <text:h text:style-name="Heading_20_2" text:outline-level="2">Version 3</text:h>
      <text:list text:style-name="L24">
        <text:list-item>
          <text:p text:style-name="P49">Proper pathfinding/navmesh </text:p>
        </text:list-item>
      </text:list>
      <text:p text:style-name="Text_20_body">Don’t jump to Version 3 yet.</text:p>
      <text:p text:style-name="Horizontal_20_Line"/>
      <text:h text:style-name="Heading_20_1" text:outline-level="1"><text:soft-page-break/>New structure</text:h>
      <text:p text:style-name="Text_20_body">Add:</text:p>
      <text:section text:style-name="Sect1" text:name="Section13">
        <text:p text:style-name="P6"><text:bookmark text:name="code-block-viewer Copy 12"/><text:span text:style-name="Source_20_Text">/entities</text:span></text:p>
        <text:p text:style-name="Preformatted_20_Text"><text:span text:style-name="Source_20_Text"><text:s text:c="2"/>Enemy.js</text:span></text:p>
        <text:p text:style-name="Preformatted_20_Text"><text:span text:style-name="Source_20_Text">/systems</text:span></text:p>
        <text:p text:style-name="P7"><text:span text:style-name="Source_20_Text"><text:s text:c="2"/>EnemySpawner.js</text:span></text:p>
      </text:section>
      <text:p text:style-name="Horizontal_20_Line"/>
      <text:h text:style-name="Heading_20_1" text:outline-level="1">1. Enemy.js</text:h>
      <text:p text:style-name="Text_20_body">Create:</text:p>
      <text:section text:style-name="Sect1" text:name="Section14">
        <text:p text:style-name="P6"><text:bookmark text:name="code-block-viewer Copy 13"/><text:span text:style-name="Source_20_Text">import * as THREE from 'three';</text:span></text:p>
        <text:p text:style-name="Preformatted_20_Text"><text:span text:style-name="Source_20_Text">export class Enemy {</text:span></text:p>
        <text:p text:style-name="Preformatted_20_Text"><text:span text:style-name="Source_20_Text"><text:s text:c="2"/>constructor(players) {</text:span></text:p>
        <text:p text:style-name="Preformatted_20_Text"><text:span text:style-name="Source_20_Text"><text:s text:c="4"/>this.players = players;</text:span></text:p>
        <text:p text:style-name="Preformatted_20_Text"><text:span text:style-name="Source_20_Text"><text:s text:c="4"/>const geometry = new THREE.BoxGeometry(1, 1, 1);</text:span></text:p>
        <text:p text:style-name="Preformatted_20_Text"><text:span text:style-name="Source_20_Text"><text:s text:c="4"/>const material = new THREE.MeshPhongMaterial({</text:span></text:p>
        <text:p text:style-name="Preformatted_20_Text"><text:span text:style-name="Source_20_Text"><text:s text:c="6"/>color: 0xff3333,</text:span></text:p>
        <text:p text:style-name="Preformatted_20_Text"><text:span text:style-name="Source_20_Text"><text:s text:c="4"/>});</text:span></text:p>
        <text:p text:style-name="Preformatted_20_Text"><text:span text:style-name="Source_20_Text"><text:s text:c="4"/>this.mesh = new THREE.Mesh(geometry, material);</text:span></text:p>
        <text:p text:style-name="Preformatted_20_Text"><text:span text:style-name="Source_20_Text"><text:s text:c="4"/>this.speed = 2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update(delta) {</text:span></text:p>
        <text:p text:style-name="Preformatted_20_Text"><text:span text:style-name="Source_20_Text"><text:s text:c="4"/>const target = this.getNearestPlayer();</text:span></text:p>
        <text:p text:style-name="Preformatted_20_Text"><text:span text:style-name="Source_20_Text"><text:s text:c="4"/>if (!target) return;</text:span></text:p>
        <text:p text:style-name="Preformatted_20_Text"><text:span text:style-name="Source_20_Text"><text:s text:c="4"/>const direction = new THREE.Vector3()</text:span></text:p>
        <text:p text:style-name="Preformatted_20_Text"><text:span text:style-name="Source_20_Text"><text:s text:c="6"/>.subVectors(</text:span></text:p>
        <text:p text:style-name="Preformatted_20_Text"><text:span text:style-name="Source_20_Text"><text:s text:c="8"/>target.mesh.position,</text:span></text:p>
        <text:p text:style-name="Preformatted_20_Text"><text:span text:style-name="Source_20_Text"><text:s text:c="8"/>this.mesh.position</text:span></text:p>
        <text:p text:style-name="Preformatted_20_Text"><text:span text:style-name="Source_20_Text"><text:s text:c="6"/>)</text:span></text:p>
        <text:p text:style-name="Preformatted_20_Text"><text:span text:style-name="Source_20_Text"><text:s text:c="6"/>.normalize();</text:span></text:p>
        <text:p text:style-name="Preformatted_20_Text"><text:span text:style-name="Source_20_Text"><text:s text:c="4"/>this.mesh.position.add(</text:span></text:p>
        <text:p text:style-name="Preformatted_20_Text"><text:span text:style-name="Source_20_Text"><text:s text:c="6"/>direction.multiplyScalar(this.speed * delta)</text:span></text:p>
        <text:p text:style-name="Preformatted_20_Text"><text:span text:style-name="Source_20_Text"><text:s text:c="4"/>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getNearestPlayer() {</text:span></text:p>
        <text:p text:style-name="Preformatted_20_Text"><text:span text:style-name="Source_20_Text"><text:s text:c="4"/>let nearest = null;</text:span></text:p>
        <text:p text:style-name="Preformatted_20_Text"><text:span text:style-name="Source_20_Text"><text:s text:c="4"/>let nearestDistance = Infinity;</text:span></text:p>
        <text:p text:style-name="Preformatted_20_Text"><text:span text:style-name="Source_20_Text"><text:s text:c="4"/>for (const player of this.players) {</text:span></text:p>
        <text:p text:style-name="Preformatted_20_Text"><text:span text:style-name="Source_20_Text"><text:s text:c="6"/>const distance =</text:span></text:p>
        <text:p text:style-name="Preformatted_20_Text"><text:span text:style-name="Source_20_Text"><text:s text:c="8"/>this.mesh.position.distanceTo(</text:span></text:p>
        <text:p text:style-name="Preformatted_20_Text"><text:span text:style-name="Source_20_Text"><text:s text:c="10"/>player.mesh.position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6"/>if (distance &lt; nearestDistance) {</text:span></text:p>
        <text:p text:style-name="Preformatted_20_Text"><text:span text:style-name="Source_20_Text"><text:s text:c="8"/>nearestDistance = distance;</text:span></text:p>
        <text:p text:style-name="Preformatted_20_Text"><text:span text:style-name="Source_20_Text"><text:s text:c="8"/>nearest = player;</text:span></text:p>
        <text:p text:style-name="Preformatted_20_Text"><text:span text:style-name="Source_20_Text"><text:s text:c="6"/>}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return nearest;</text:span></text:p>
        <text:p text:style-name="Preformatted_20_Text"><text:span text:style-name="Source_20_Text"><text:s text:c="2"/>}</text:span></text:p>
        <text:p text:style-name="P7"><text:span text:style-name="Source_20_Text">}</text:span></text:p>
      </text:section>
      <text:p text:style-name="Horizontal_20_Line"/>
      <text:h text:style-name="Heading_20_1" text:outline-level="1"><text:soft-page-break/>2. systems/EnemySpawner.js</text:h>
      <text:section text:style-name="Sect1" text:name="Section15">
        <text:p text:style-name="P6"><text:bookmark text:name="code-block-viewer Copy 14"/><text:span text:style-name="Source_20_Text">import { Enemy } from '../entities/Enemy';</text:span></text:p>
        <text:p text:style-name="Preformatted_20_Text"><text:span text:style-name="Source_20_Text">export class EnemySpawner {</text:span></text:p>
        <text:p text:style-name="Preformatted_20_Text"><text:span text:style-name="Source_20_Text"><text:s text:c="2"/>constructor(scene, players) {</text:span></text:p>
        <text:p text:style-name="Preformatted_20_Text"><text:span text:style-name="Source_20_Text"><text:s text:c="4"/>this.scene = scene;</text:span></text:p>
        <text:p text:style-name="Preformatted_20_Text"><text:span text:style-name="Source_20_Text"><text:s text:c="4"/>this.players = players;</text:span></text:p>
        <text:p text:style-name="Preformatted_20_Text"><text:span text:style-name="Source_20_Text"><text:s text:c="4"/>this.enemies = [];</text:span></text:p>
        <text:p text:style-name="Preformatted_20_Text"><text:span text:style-name="Source_20_Text"><text:s text:c="4"/>this.spawnTimer = 0;</text:span></text:p>
        <text:p text:style-name="Preformatted_20_Text"><text:span text:style-name="Source_20_Text"><text:s text:c="4"/>this.spawnInterval = 2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update(delta) {</text:span></text:p>
        <text:p text:style-name="Preformatted_20_Text"><text:span text:style-name="Source_20_Text"><text:s text:c="4"/>this.spawnTimer -= delta;</text:span></text:p>
        <text:p text:style-name="Preformatted_20_Text"><text:span text:style-name="Source_20_Text"><text:s text:c="4"/>if (this.spawnTimer &lt;= 0) {</text:span></text:p>
        <text:p text:style-name="Preformatted_20_Text"><text:span text:style-name="Source_20_Text"><text:s text:c="6"/>this.spawnEnemy();</text:span></text:p>
        <text:p text:style-name="Preformatted_20_Text"><text:span text:style-name="Source_20_Text"><text:s text:c="6"/>this.spawnTimer = this.spawnInterval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for (const enemy of this.enemies) {</text:span></text:p>
        <text:p text:style-name="Preformatted_20_Text"><text:span text:style-name="Source_20_Text"><text:s text:c="6"/>enemy.update(delta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spawnEnemy() {</text:span></text:p>
        <text:p text:style-name="Preformatted_20_Text"><text:span text:style-name="Source_20_Text"><text:s text:c="4"/>const enemy = new Enemy(this.players);</text:span></text:p>
        <text:p text:style-name="Preformatted_20_Text"><text:span text:style-name="Source_20_Text"><text:s text:c="4"/>const edge = Math.floor(Math.random() * 4);</text:span></text:p>
        <text:p text:style-name="Preformatted_20_Text"><text:span text:style-name="Source_20_Text"><text:s text:c="4"/>const range = 20;</text:span></text:p>
        <text:p text:style-name="Preformatted_20_Text"><text:span text:style-name="Source_20_Text"><text:s text:c="4"/>switch (edge) {</text:span></text:p>
        <text:p text:style-name="Preformatted_20_Text"><text:span text:style-name="Source_20_Text"><text:s text:c="6"/>case 0:</text:span></text:p>
        <text:p text:style-name="Preformatted_20_Text"><text:span text:style-name="Source_20_Text"><text:s text:c="8"/>enemy.mesh.position.set(</text:span></text:p>
        <text:p text:style-name="Preformatted_20_Text"><text:span text:style-name="Source_20_Text"><text:s text:c="10"/>-range,</text:span></text:p>
        <text:p text:style-name="Preformatted_20_Text"><text:span text:style-name="Source_20_Text"><text:s text:c="10"/>0.5,</text:span></text:p>
        <text:p text:style-name="Preformatted_20_Text"><text:span text:style-name="Source_20_Text"><text:s text:c="10"/>Math.random() * range * 2 - range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break;</text:span></text:p>
        <text:p text:style-name="Preformatted_20_Text"><text:span text:style-name="Source_20_Text"><text:s text:c="6"/>case 1:</text:span></text:p>
        <text:p text:style-name="Preformatted_20_Text"><text:span text:style-name="Source_20_Text"><text:s text:c="8"/>enemy.mesh.position.set(</text:span></text:p>
        <text:p text:style-name="Preformatted_20_Text"><text:span text:style-name="Source_20_Text"><text:s text:c="10"/>range,</text:span></text:p>
        <text:p text:style-name="Preformatted_20_Text"><text:span text:style-name="Source_20_Text"><text:s text:c="10"/>0.5,</text:span></text:p>
        <text:p text:style-name="Preformatted_20_Text"><text:span text:style-name="Source_20_Text"><text:s text:c="10"/>Math.random() * range * 2 - range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break;</text:span></text:p>
        <text:p text:style-name="Preformatted_20_Text"><text:span text:style-name="Source_20_Text"><text:s text:c="6"/>case 2:</text:span></text:p>
        <text:p text:style-name="Preformatted_20_Text"><text:span text:style-name="Source_20_Text"><text:s text:c="8"/>enemy.mesh.position.set(</text:span></text:p>
        <text:p text:style-name="Preformatted_20_Text"><text:span text:style-name="Source_20_Text"><text:s text:c="10"/>Math.random() * range * 2 - range,</text:span></text:p>
        <text:p text:style-name="Preformatted_20_Text"><text:span text:style-name="Source_20_Text"><text:s text:c="10"/>0.5,</text:span></text:p>
        <text:p text:style-name="Preformatted_20_Text"><text:span text:style-name="Source_20_Text"><text:s text:c="10"/>-range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break;</text:span></text:p>
        <text:p text:style-name="Preformatted_20_Text"><text:span text:style-name="Source_20_Text"><text:s text:c="6"/>case 3:</text:span></text:p>
        <text:p text:style-name="Preformatted_20_Text"><text:span text:style-name="Source_20_Text"><text:s text:c="8"/>enemy.mesh.position.set(</text:span></text:p>
        <text:p text:style-name="Preformatted_20_Text"><text:span text:style-name="Source_20_Text"><text:s text:c="10"/>Math.random() * range * 2 - range,</text:span></text:p>
        <text:p text:style-name="Preformatted_20_Text"><text:span text:style-name="Source_20_Text"><text:s text:c="10"/>0.5,</text:span></text:p>
        <text:p text:style-name="Preformatted_20_Text"><text:span text:style-name="Source_20_Text"><text:s text:c="10"/>range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break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this.scene.add(enemy.mesh);</text:span></text:p>
        <text:p text:style-name="Preformatted_20_Text"><text:span text:style-name="Source_20_Text"><text:s text:c="4"/>this.enemies.push(enemy);</text:span></text:p>
        <text:p text:style-name="Preformatted_20_Text"><text:span text:style-name="Source_20_Text"><text:s text:c="2"/>}</text:span></text:p>
        <text:p text:style-name="P7"><text:span text:style-name="Source_20_Text">}</text:span></text:p>
      </text:section>
      <text:p text:style-name="Horizontal_20_Line"/>
      <text:h text:style-name="Heading_20_1" text:outline-level="1"><text:soft-page-break/>3. Update Game.js</text:h>
      <text:p text:style-name="Text_20_body">Add import:</text:p>
      <text:section text:style-name="Sect1" text:name="Section16">
        <text:p text:style-name="P30"><text:bookmark text:name="code-block-viewer Copy 15"/><text:span text:style-name="Source_20_Text">import { EnemySpawner } from '../systems/EnemySpawner';</text:span></text:p>
      </text:section>
      <text:p text:style-name="Text_20_body">After creating players:</text:p>
      <text:section text:style-name="Sect1" text:name="Section17">
        <text:p text:style-name="P6"><text:bookmark text:name="code-block-viewer Copy 16"/><text:span text:style-name="Source_20_Text">this.enemySpawner = new EnemySpawner(</text:span></text:p>
        <text:p text:style-name="Preformatted_20_Text"><text:span text:style-name="Source_20_Text"><text:s text:c="2"/>this.scene,</text:span></text:p>
        <text:p text:style-name="Preformatted_20_Text"><text:span text:style-name="Source_20_Text"><text:s text:c="2"/>[this.player1, this.player2]</text:span></text:p>
        <text:p text:style-name="P7"><text:span text:style-name="Source_20_Text">);</text:span></text:p>
      </text:section>
      <text:p text:style-name="Text_20_body">Inside <text:span text:style-name="Source_20_Text">animate()</text:span>:</text:p>
      <text:section text:style-name="Sect1" text:name="Section18">
        <text:p text:style-name="P30"><text:bookmark text:name="code-block-viewer Copy 17"/><text:span text:style-name="Source_20_Text">this.enemySpawner.update(delta);</text:span></text:p>
      </text:section>
      <text:p text:style-name="Horizontal_20_Line"/>
      <text:h text:style-name="Heading_20_1" text:outline-level="1">What happens now</text:h>
      <text:p text:style-name="Text_20_body">You’ll immediately get:</text:p>
      <text:list text:style-name="L25">
        <text:list-item>
          <text:p text:style-name="P50">enemies spawning around the map </text:p>
        </text:list-item>
        <text:list-item>
          <text:p text:style-name="P50">enemies choosing nearest player </text:p>
        </text:list-item>
        <text:list-item>
          <text:p text:style-name="P50">autonomous movement </text:p>
        </text:list-item>
        <text:list-item>
          <text:p text:style-name="P51">pressure gameplay </text:p>
        </text:list-item>
      </text:list>
      <text:p text:style-name="Text_20_body">That’s the moment it starts feeling like an actual arcade game.</text:p>
      <text:p text:style-name="Horizontal_20_Line"/>
      <text:h text:style-name="Heading_20_1" text:outline-level="1">Next important improvement: enemy separation</text:h>
      <text:p text:style-name="Text_20_body">Without this, enemies stack into one blob.</text:p>
      <text:p text:style-name="Text_20_body">Add this later:</text:p>
      <text:section text:style-name="Sect1" text:name="Section19">
        <text:p text:style-name="P6"><text:bookmark text:name="code-block-viewer Copy 18"/><text:span text:style-name="Source_20_Text">for (const other of enemies) {</text:span></text:p>
        <text:p text:style-name="Preformatted_20_Text"><text:span text:style-name="Source_20_Text"><text:s text:c="2"/>if (other === this) continue;</text:span></text:p>
        <text:p text:style-name="Preformatted_20_Text"><text:span text:style-name="Source_20_Text"><text:s text:c="2"/>const distance = this.mesh.position.distanceTo(</text:span></text:p>
        <text:p text:style-name="Preformatted_20_Text"><text:span text:style-name="Source_20_Text"><text:s text:c="4"/>other.mesh.position</text:span></text:p>
        <text:p text:style-name="Preformatted_20_Text"><text:span text:style-name="Source_20_Text"><text:s text:c="2"/>);</text:span></text:p>
        <text:p text:style-name="Preformatted_20_Text"><text:span text:style-name="Source_20_Text"><text:s text:c="2"/>if (distance &lt; 1.5) {</text:span></text:p>
        <text:p text:style-name="Preformatted_20_Text"><text:span text:style-name="Source_20_Text"><text:s text:c="4"/>// push apart</text:span></text:p>
        <text:p text:style-name="Preformatted_20_Text"><text:span text:style-name="Source_20_Text"><text:s text:c="2"/>}</text:span></text:p>
        <text:p text:style-name="P7"><text:span text:style-name="Source_20_Text">}</text:span></text:p>
      </text:section>
      <text:p text:style-name="Text_20_body">This tiny change massively improves game feel.</text:p>
      <text:p text:style-name="Horizontal_20_Line"/>
      <text:h text:style-name="Heading_20_1" text:outline-level="1"><text:soft-page-break/>Obstacle awareness (future)</text:h>
      <text:p text:style-name="Text_20_body">You’re already thinking correctly.</text:p>
      <text:p text:style-name="Text_20_body">There are three levels:</text:p>
      <text:p text:style-name="Horizontal_20_Line"/>
      <text:h text:style-name="Heading_20_2" text:outline-level="2">Level 1 — Steering (recommended first)</text:h>
      <text:p text:style-name="Text_20_body">Enemies:</text:p>
      <text:list text:style-name="L26">
        <text:list-item>
          <text:p text:style-name="P52">move toward player </text:p>
        </text:list-item>
        <text:list-item>
          <text:p text:style-name="P53">slightly repel from walls </text:p>
        </text:list-item>
      </text:list>
      <text:p text:style-name="Text_20_body">Cheap and arcade-perfect.</text:p>
      <text:p text:style-name="Horizontal_20_Line"/>
      <text:h text:style-name="Heading_20_2" text:outline-level="2">Level 2 — Grid pathfinding</text:h>
      <text:p text:style-name="Text_20_body">Use:</text:p>
      <text:list text:style-name="L27">
        <text:list-item>
          <text:p text:style-name="P54">A* </text:p>
        </text:list-item>
        <text:list-item>
          <text:p text:style-name="P54">tile map </text:p>
        </text:list-item>
        <text:list-item>
          <text:p text:style-name="P55">occupancy grid </text:p>
        </text:list-item>
      </text:list>
      <text:p text:style-name="Text_20_body">Good for indoor maps.</text:p>
      <text:p text:style-name="Horizontal_20_Line"/>
      <text:h text:style-name="Heading_20_2" text:outline-level="2">Level 3 — NavMesh</text:h>
      <text:p text:style-name="Text_20_body">Use:</text:p>
      <text:list text:style-name="L28">
        <text:list-item>
          <text:p text:style-name="P56">navigation mesh </text:p>
        </text:list-item>
        <text:list-item>
          <text:p text:style-name="P57">funnel algorithms </text:p>
        </text:list-item>
      </text:list>
      <text:p text:style-name="Text_20_body">This is what modern 3D games use.</text:p>
      <text:p text:style-name="Text_20_body">Overkill for now.</text:p>
      <text:p text:style-name="Horizontal_20_Line"/>
      <text:h text:style-name="Heading_20_1" text:outline-level="1">My recommendation for YOUR game</text:h>
      <text:p text:style-name="Text_20_body">Because you’re doing a spiritual successor to an arcade shooter:</text:p>
      <text:h text:style-name="Heading_20_3" text:outline-level="3">Use:</text:h>
      <text:list text:style-name="L29">
        <text:list-item>
          <text:p text:style-name="P58">simple steering </text:p>
        </text:list-item>
        <text:list-item>
          <text:p text:style-name="P58">collision volumes </text:p>
        </text:list-item>
        <text:list-item>
          <text:p text:style-name="P59">lightweight AI </text:p>
        </text:list-item>
      </text:list>
      <text:h text:style-name="Heading_20_3" text:outline-level="3"><text:soft-page-break/>Avoid:</text:h>
      <text:list text:style-name="L30">
        <text:list-item>
          <text:p text:style-name="P60">heavy physics </text:p>
        </text:list-item>
        <text:list-item>
          <text:p text:style-name="P60">realistic movement </text:p>
        </text:list-item>
        <text:list-item>
          <text:p text:style-name="P61">complex pathfinding </text:p>
        </text:list-item>
      </text:list>
      <text:p text:style-name="Text_20_body">The arcade feel actually benefits from simpler AI.</text:p>
      <text:p text:style-name="Horizontal_20_Line"/>
      <text:h text:style-name="Heading_20_1" text:outline-level="1">One system you should add soon</text:h>
      <text:p text:style-name="Text_20_body">A shared base entity class.</text:p>
      <text:p text:style-name="Text_20_body">Eventually you’ll want:</text:p>
      <text:section text:style-name="Sect1" text:name="Section20">
        <text:p text:style-name="P6"><text:bookmark text:name="code-block-viewer Copy 19"/><text:span text:style-name="Source_20_Text">Entity</text:span></text:p>
        <text:p text:style-name="Preformatted_20_Text"><text:span text:style-name="Source_20_Text"><text:s/>├── Player</text:span></text:p>
        <text:p text:style-name="Preformatted_20_Text"><text:span text:style-name="Source_20_Text"><text:s/>├── Enemy</text:span></text:p>
        <text:p text:style-name="P7"><text:span text:style-name="Source_20_Text"><text:s/>├── Bullet</text:span></text:p>
      </text:section>
      <text:p text:style-name="Text_20_body">because:</text:p>
      <text:list text:style-name="L31">
        <text:list-item>
          <text:p text:style-name="P62">health </text:p>
        </text:list-item>
        <text:list-item>
          <text:p text:style-name="P62">collision </text:p>
        </text:list-item>
        <text:list-item>
          <text:p text:style-name="P62">update() </text:p>
        </text:list-item>
        <text:list-item>
          <text:p text:style-name="P63">destroy() </text:p>
        </text:list-item>
      </text:list>
      <text:p text:style-name="Text_20_body">…will all repeat otherwise.</text:p>
      <text:p text:style-name="Text_20_body">But don’t refactor too early.</text:p>
      <text:p text:style-name="Horizontal_20_Line"/>
      <text:h text:style-name="Heading_20_1" text:outline-level="1">Next excellent milestone</text:h>
      <text:p text:style-name="Text_20_body">Your next “this feels real” milestone is:</text:p>
      <text:h text:style-name="Heading_20_2" text:outline-level="2">Enemies can:</text:h>
      <text:list text:style-name="L32">
        <text:list-item>
          <text:p text:style-name="P64">chase </text:p>
        </text:list-item>
        <text:list-item>
          <text:p text:style-name="P64">collide </text:p>
        </text:list-item>
        <text:list-item>
          <text:p text:style-name="P64">die </text:p>
        </text:list-item>
        <text:list-item>
          <text:p text:style-name="P64">explode </text:p>
        </text:list-item>
        <text:list-item>
          <text:p text:style-name="P65">damage players </text:p>
        </text:list-item>
      </text:list>
      <text:p text:style-name="Text_20_body">Once that loop exists, you’ve crossed from “graphics prototype” into “game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6T17:58:01.726161200</meta:creation-date>
    <dc:date>2026-05-26T17:59:15.404796200</dc:date>
    <meta:editing-duration>PT1M16S</meta:editing-duration>
    <meta:editing-cycles>1</meta:editing-cycles>
    <meta:document-statistic meta:table-count="0" meta:image-count="0" meta:object-count="0" meta:page-count="14" meta:paragraph-count="528" meta:word-count="1937" meta:character-count="14000" meta:non-whitespace-character-count="11419"/>
    <meta:generator>LibreOffice/26.2.0.3$Windows_X86_64 LibreOffice_project/620$Build-3</meta:generator>
  </office:meta>
</office:document-meta>
</file>